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4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1">
      <style:graphic-properties draw:fill="none" fo:clip="rect(0in, 0in, 0in, 0in)" draw:stroke="none" draw:luminance="0%" draw:contrast="0%" draw:imag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9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none" fo:clip="rect(0in, 0in, 0in, 0in)" draw:stroke="none" draw:luminance="0%" draw:contrast="0%" draw:image-opacity="100%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90" draw:master-page-name="Master1-Layout7-blank-Em-branco" presentation:presentation-page-layout-name="Master1-PPL7" draw:id="Slide-256">
        <draw:frame draw:id="id196" presentation:style-name="a1193" draw:name="Título 1" svg:x="0.00866in" svg:y="0.70866in" svg:width="9.92087in" svg:height="2.99213in" presentation:class="title" presentation:placeholder="false">
          <draw:text-box>
            <text:p text:style-name="a1192" text:class-names="" text:cond-style-name=""><text:span text:style-name="a1191" text:class-names="">Capítulo 5: Gerenciamento de Dados</text:span></text:p>
          </draw:text-box>
          <svg:title/>
          <svg:desc/>
        </draw:frame>
        <draw:frame draw:id="id197" presentation:style-name="a1204" draw:name="Subtítulo 2" svg:x="0.31496in" svg:y="3.93701in" svg:width="9.60591in" svg:height="1.16404in" presentation:class="subtitle" presentation:placeholder="false">
          <draw:text-box>
            <text:p text:style-name="a1198" text:class-names="" text:cond-style-name=""><text:span text:style-name="a1194" text:class-names="">Disciplina: Sistemas de<text:s text:c="1"/></text:span><text:span text:style-name="a1195" text:class-names="">Informação – Prof. David<text:s text:c="1"/></text:span><text:span text:style-name="a1196" text:class-names="">Tsai</text:span><text:span text:style-name="a1197" text:class-names=""/></text:p>
            <text:p text:style-name="a1203" text:class-names="" text:cond-style-name=""><text:span text:style-name="a1199" text:class-names="">Alunos: Gabriel Didi, Jorge Oliveira e<text:s text:c="1"/></text:span><text:span text:style-name="a1200" text:class-names="">Walisson</text:span><text:span text:style-name="a1201" text:class-names=""><text:s text:c="1"/>Gabrie</text:span><text:span text:style-name="a1202" text:class-names="">l</text:span></text:p>
          </draw:text-box>
          <svg:title/>
          <svg:desc/>
        </draw:frame>
        <presentation:notes draw:style-name="a1210">
          <draw:frame draw:id="id198" draw:style-name="a1207" draw:name="Espaço Reservado para Número de Slide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1" svg:x="0.23611in" svg:y="0.88889in" svg:width="7.79514in" svg:height="4.38542in" presentation:class="page" draw:id="id199" presentation:style-name="a1208" draw:name="Espaço Reservado para Imagem de Slide 1">
            <svg:title/>
            <svg:desc/>
          </draw:page-thumbnail>
          <draw:frame draw:id="id200" presentation:style-name="a120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1" draw:master-page-name="Master2-Layout7-blank-Em-branco" presentation:presentation-page-layout-name="Master2-PPL7" draw:id="Slide-257">
        <draw:frame draw:id="id201" presentation:style-name="a1214" draw:name="Título 1" svg:x="0.55118in" svg:y="0.6185in" svg:width="9.92087in" svg:height="1.03504in" presentation:class="title" presentation:placeholder="false">
          <draw:text-box>
            <text:p text:style-name="a1213" text:class-names="" text:cond-style-name=""><text:span text:style-name="a1212" text:class-names="">Gerenciamento de Dados</text:span></text:p>
          </draw:text-box>
          <svg:title/>
          <svg:desc/>
        </draw:frame>
        <draw:frame draw:id="id202" presentation:style-name="a1227" draw:name="Espaço Reservado para Texto 2" svg:x="0.55118in" svg:y="1.81102in" svg:width="9.92087in" svg:height="3.85827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Dados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Fácil acesso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Vantagem competitiva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Papel estratégico</text:span></text:p>
              </text:list-item>
            </text:list>
          </draw:text-box>
          <svg:title/>
          <svg:desc/>
        </draw:frame>
        <presentation:notes draw:style-name="a1233">
          <draw:frame draw:id="id203" draw:style-name="a1230" draw:name="Espaço Reservado para Número de Slide 6" svg:x="4.67953in" svg:y="11.10827in" svg:width="3.5878in" svg:height="0.58425in">
            <draw:text-box>
              <text:p text:style-name="a1229" text:class-names="" text:cond-style-name=""><text:span text:style-name="a122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04" presentation:style-name="a1231" draw:name="Espaço Reservado para Imagem de Slide 1">
            <svg:title/>
            <svg:desc/>
          </draw:page-thumbnail>
          <draw:frame draw:id="id205" presentation:style-name="a123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34" draw:master-page-name="Master2-Layout7-blank-Em-branco" presentation:presentation-page-layout-name="Master2-PPL7" draw:id="Slide-258">
        <draw:frame draw:id="id206" presentation:style-name="a1237" draw:name="Título 1" svg:x="0.55118in" svg:y="0.6185in" svg:width="9.92087in" svg:height="1.03504in" presentation:class="title" presentation:placeholder="false">
          <draw:text-box>
            <text:p text:style-name="a1236" text:class-names="" text:cond-style-name=""><text:span text:style-name="a1235" text:class-names="">Conceitos<text:tab/></text:span></text:p>
          </draw:text-box>
          <svg:title/>
          <svg:desc/>
        </draw:frame>
        <draw:frame draw:id="id207" presentation:style-name="a1250" draw:name="Espaço Reservado para Texto 2" svg:x="0.55118in" svg:y="1.81102in" svg:width="9.92087in" svg:height="3.23583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Caracter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Campo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Registros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Arquivos</text:span></text:p>
              </text:list-item>
            </text:list>
          </draw:text-box>
          <svg:title/>
          <svg:desc/>
        </draw:frame>
        <presentation:notes draw:style-name="a1256">
          <draw:frame draw:id="id208" draw:style-name="a1253" draw:name="Espaço Reservado para Número de Slide 6" svg:x="4.67953in" svg:y="11.10827in" svg:width="3.5878in" svg:height="0.58425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09" presentation:style-name="a1254" draw:name="Espaço Reservado para Imagem de Slide 1">
            <svg:title/>
            <svg:desc/>
          </draw:page-thumbnail>
          <draw:frame draw:id="id210" presentation:style-name="a125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57" draw:master-page-name="Master2-Layout7-blank-Em-branco" presentation:presentation-page-layout-name="Master2-PPL7" draw:id="Slide-259">
        <draw:frame draw:id="id211" presentation:style-name="a1260" draw:name="Título 1" svg:x="0.55118in" svg:y="0.6185in" svg:width="9.92087in" svg:height="1.03504in" presentation:class="title" presentation:placeholder="false">
          <draw:text-box>
            <text:p text:style-name="a1259" text:class-names="" text:cond-style-name=""><text:span text:style-name="a1258" text:class-names="">Conceitos</text:span></text:p>
          </draw:text-box>
          <svg:title/>
          <svg:desc/>
        </draw:frame>
        <draw:frame draw:id="id212" presentation:style-name="a1261" svg:x="0.70866in" svg:y="1.49488in" svg:width="9.46811in" svg:height="4.2523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267">
          <draw:frame draw:id="id213" draw:style-name="a1264" draw:name="Espaço Reservado para Número de Slide 6" svg:x="4.67953in" svg:y="11.10827in" svg:width="3.5878in" svg:height="0.58425in">
            <draw:text-box>
              <text:p text:style-name="a1263" text:class-names="" text:cond-style-name=""><text:span text:style-name="a1262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14" presentation:style-name="a1265" draw:name="Espaço Reservado para Imagem de Slide 1">
            <svg:title/>
            <svg:desc/>
          </draw:page-thumbnail>
          <draw:frame draw:id="id215" presentation:style-name="a126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68" draw:master-page-name="Master2-Layout7-blank-Em-branco" presentation:presentation-page-layout-name="Master2-PPL7" draw:id="Slide-260">
        <draw:frame draw:id="id216" presentation:style-name="a1271" draw:name="Título 1" svg:x="0.55118in" svg:y="0.6185in" svg:width="9.92087in" svg:height="1.03504in" presentation:class="title" presentation:placeholder="false">
          <draw:text-box>
            <text:p text:style-name="a1270" text:class-names="" text:cond-style-name=""><text:span text:style-name="a1269" text:class-names="">O Banco de dados</text:span></text:p>
          </draw:text-box>
          <svg:title/>
          <svg:desc/>
        </draw:frame>
        <draw:frame draw:id="id217" presentation:style-name="a1278" draw:name="Espaço Reservado para Texto 2" svg:x="0.55118in" svg:y="1.81102in" svg:width="9.92087in" svg:height="3.23583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Entidades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Relacionamentos</text:span></text:p>
              </text:list-item>
            </text:list>
          </draw:text-box>
          <svg:title/>
          <svg:desc/>
        </draw:frame>
        <draw:frame draw:id="id218" draw:style-name="a1279" svg:x="1.88976in" svg:y="2.99213in" svg:width="7.53228in" svg:height="2.83386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285">
          <draw:frame draw:id="id219" draw:style-name="a1282" draw:name="Espaço Reservado para Número de Slide 6" svg:x="4.67953in" svg:y="11.10827in" svg:width="3.5878in" svg:height="0.58425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20" presentation:style-name="a1283" draw:name="Espaço Reservado para Imagem de Slide 1">
            <svg:title/>
            <svg:desc/>
          </draw:page-thumbnail>
          <draw:frame draw:id="id221" presentation:style-name="a128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86" draw:master-page-name="Master2-Layout7-blank-Em-branco" presentation:presentation-page-layout-name="Master2-PPL7" draw:id="Slide-261">
        <draw:frame draw:id="id222" presentation:style-name="a1289" draw:name="Título 1" svg:x="0.55118in" svg:y="0.6185in" svg:width="9.92087in" svg:height="1.03504in" presentation:class="title" presentation:placeholder="false">
          <draw:text-box>
            <text:p text:style-name="a1288" text:class-names="" text:cond-style-name=""><text:span text:style-name="a1287" text:class-names="">Gerenciamento de Banco de dados</text:span></text:p>
          </draw:text-box>
          <svg:title/>
          <svg:desc/>
        </draw:frame>
        <draw:frame draw:id="id223" presentation:style-name="a1296" draw:name="Espaço Reservado para Texto 2" svg:x="0.55118in" svg:y="1.81102in" svg:width="9.92087in" svg:height="3.23583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Sistema de gerenciamento de banco de dados (DBMS)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Organizados por aplicação</text:span></text:p>
              </text:list-item>
            </text:list>
          </draw:text-box>
          <svg:title/>
          <svg:desc/>
        </draw:frame>
        <presentation:notes draw:style-name="a1302">
          <draw:frame draw:id="id224" draw:style-name="a1299" draw:name="Espaço Reservado para Número de Slide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25" presentation:style-name="a1300" draw:name="Espaço Reservado para Imagem de Slide 1">
            <svg:title/>
            <svg:desc/>
          </draw:page-thumbnail>
          <draw:frame draw:id="id226" presentation:style-name="a130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03" draw:master-page-name="Master2-Layout7-blank-Em-branco" presentation:presentation-page-layout-name="Master2-PPL7" draw:id="Slide-262">
        <draw:frame draw:id="id227" presentation:style-name="a1306" draw:name="Título 1" svg:x="0.55118in" svg:y="0.6185in" svg:width="9.92087in" svg:height="1.03504in" presentation:class="title" presentation:placeholder="false">
          <draw:text-box>
            <text:p text:style-name="a1305" text:class-names="" text:cond-style-name=""><text:span text:style-name="a1304" text:class-names="">Gerenciamento de Banco de dados</text:span></text:p>
          </draw:text-box>
          <svg:title/>
          <svg:desc/>
        </draw:frame>
        <draw:frame draw:id="id228" presentation:style-name="a1307" draw:transform="translate(-2.69449in -2.17559in) rotate(-0.00349) translate(5.40814in 3.66057in)" svg:width="5.38898in" svg:height="4.3511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presentation:notes draw:style-name="a1313">
          <draw:frame draw:id="id229" draw:style-name="a1310" draw:name="Espaço Reservado para Número de Slide 6" svg:x="4.67953in" svg:y="11.10827in" svg:width="3.5878in" svg:height="0.58425in">
            <draw:text-box>
              <text:p text:style-name="a1309" text:class-names="" text:cond-style-name=""><text:span text:style-name="a130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30" presentation:style-name="a1311" draw:name="Espaço Reservado para Imagem de Slide 1">
            <svg:title/>
            <svg:desc/>
          </draw:page-thumbnail>
          <draw:frame draw:id="id231" presentation:style-name="a131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14" draw:master-page-name="Master2-Layout7-blank-Em-branco" presentation:presentation-page-layout-name="Master2-PPL7" draw:id="Slide-263">
        <draw:frame draw:id="id232" presentation:style-name="a1317" draw:name="Título 1" svg:x="0.55118in" svg:y="0.45236in" svg:width="9.92087in" svg:height="1.36732in" presentation:class="title" presentation:placeholder="false">
          <draw:text-box>
            <text:p text:style-name="a1316" text:class-names="" text:cond-style-name=""><text:span text:style-name="a1315" text:class-names="">Atividades básicas do gerenciamento de Banco de dados</text:span></text:p>
          </draw:text-box>
          <svg:title/>
          <svg:desc/>
        </draw:frame>
        <draw:frame draw:id="id233" presentation:style-name="a1327" draw:name="Espaço Reservado para Texto 2" svg:x="0.55118in" svg:y="1.81102in" svg:width="9.92087in" svg:height="3.23583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Atualização e manutenção do banco de dados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Fornecimento das informações requisitadas para cada aplicação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Fornecimento de capacidade de consulta e emissão de relatório</text:span></text:p>
              </text:list-item>
            </text:list>
          </draw:text-box>
          <svg:title/>
          <svg:desc/>
        </draw:frame>
        <presentation:notes draw:style-name="a1333">
          <draw:frame draw:id="id234" draw:style-name="a1330" draw:name="Espaço Reservado para Número de Slide 6" svg:x="4.67953in" svg:y="11.10827in" svg:width="3.5878in" svg:height="0.58425in">
            <draw:text-box>
              <text:p text:style-name="a1329" text:class-names="" text:cond-style-name=""><text:span text:style-name="a132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35" presentation:style-name="a1331" draw:name="Espaço Reservado para Imagem de Slide 1">
            <svg:title/>
            <svg:desc/>
          </draw:page-thumbnail>
          <draw:frame draw:id="id236" presentation:style-name="a133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34" draw:master-page-name="Master2-Layout7-blank-Em-branco" presentation:presentation-page-layout-name="Master2-PPL7" draw:id="Slide-264">
        <draw:frame draw:id="id237" presentation:style-name="a1337" draw:name="Título 1" svg:x="0.55118in" svg:y="0.45236in" svg:width="9.92087in" svg:height="1.36732in" presentation:class="title" presentation:placeholder="false">
          <draw:text-box>
            <text:p text:style-name="a1336" text:class-names="" text:cond-style-name=""><text:span text:style-name="a1335" text:class-names="">Utilizando o software de gerenciamento de Banco de dados</text:span></text:p>
          </draw:text-box>
          <svg:title/>
          <svg:desc/>
        </draw:frame>
        <draw:frame draw:id="id238" presentation:style-name="a1362" draw:name="Espaço Reservado para Texto 2" svg:x="0.55157in" svg:y="1.9685in" svg:width="9.92087in" svg:height="4.09449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DBMS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Características do DBMS:</text:span></text:p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Definição do Banco de dados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Acesso informal</text:span></text:p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>Desenvolvimento de aplicações</text:span></text:p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53" text:class-names="">Interface de linguagem codificada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Processamento de transações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Ajuste do banco de dado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68">
          <draw:frame draw:id="id239" draw:style-name="a1365" draw:name="Espaço Reservado para Número de Slide 6" svg:x="4.67953in" svg:y="11.10827in" svg:width="3.5878in" svg:height="0.5842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40" presentation:style-name="a1366" draw:name="Espaço Reservado para Imagem de Slide 1">
            <svg:title/>
            <svg:desc/>
          </draw:page-thumbnail>
          <draw:frame draw:id="id241" presentation:style-name="a136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69" draw:master-page-name="Master2-Layout7-blank-Em-branco" presentation:presentation-page-layout-name="Master2-PPL7" draw:id="Slide-265">
        <draw:frame draw:id="id242" presentation:style-name="a1372" draw:name="Título 1" svg:x="0.55118in" svg:y="0.45236in" svg:width="9.92087in" svg:height="1.36732in" presentation:class="title" presentation:placeholder="false">
          <draw:text-box>
            <text:p text:style-name="a1371" text:class-names="" text:cond-style-name=""><text:span text:style-name="a1370" text:class-names="">Desenvolvimento de Banco de dados</text:span></text:p>
          </draw:text-box>
          <svg:title/>
          <svg:desc/>
        </draw:frame>
        <draw:frame draw:id="id243" presentation:style-name="a1379" draw:name="Espaço Reservado para Texto 2" svg:x="0.55118in" svg:y="1.81102in" svg:width="9.92087in" svg:height="3.23583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Pacote de gerenciamento: Microsoft Access e Lotus Approach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Contratar especialista: Oracle e DB2 (IBM)</text:span></text:p>
              </text:list-item>
            </text:list>
          </draw:text-box>
          <svg:title/>
          <svg:desc/>
        </draw:frame>
        <draw:frame draw:id="id244" draw:style-name="a1380" svg:x="3.14961in" svg:y="3.74606in" svg:width="2.15591in" svg:height="1.68701in" style:rel-width="scale" style:rel-height="scale">
          <draw:image xlink:href="media/image4.png" xlink:type="simple" xlink:show="embed" xlink:actuate="onLoad"/>
          <svg:title/>
          <svg:desc/>
        </draw:frame>
        <draw:frame draw:id="id245" draw:style-name="a1381" svg:x="5.76929in" svg:y="3.64331in" svg:width="1.78976in" svg:height="1.7897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87">
          <draw:frame draw:id="id246" draw:style-name="a1384" draw:name="Espaço Reservado para Número de Slide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247" presentation:style-name="a1385" draw:name="Espaço Reservado para Imagem de Slide 1">
            <svg:title/>
            <svg:desc/>
          </draw:page-thumbnail>
          <draw:frame draw:id="id248" presentation:style-name="a138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88" draw:master-page-name="Master2-Layout7-blank-Em-branco" presentation:presentation-page-layout-name="Master2-PPL7" draw:id="Slide-266">
        <draw:frame draw:id="id249" presentation:style-name="a1391" draw:name="Título 1" svg:x="0.55118in" svg:y="0.6185in" svg:width="9.92087in" svg:height="1.03504in" presentation:class="title" presentation:placeholder="false">
          <draw:text-box>
            <text:p text:style-name="a1390" text:class-names="" text:cond-style-name=""><text:span text:style-name="a1389" text:class-names="">Consulta ao Banco de Dados</text:span></text:p>
          </draw:text-box>
          <svg:title/>
          <svg:desc/>
        </draw:frame>
        <draw:frame draw:id="id250" presentation:style-name="a1398" draw:name="Espaço Reservado para Texto 2" svg:x="0.55118in" svg:y="1.81102in" svg:width="9.92087in" svg:height="3.23583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Consulta SQL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Consultas gráficas</text:span></text:p>
              </text:list-item>
            </text:list>
          </draw:text-box>
          <svg:title/>
          <svg:desc/>
        </draw:frame>
        <draw:frame draw:id="id251" draw:style-name="a1399" svg:x="1.25984in" svg:y="3.21457in" svg:width="2.4685in" svg:height="2.2185in" style:rel-width="scale" style:rel-height="scale">
          <draw:image xlink:href="media/image6.png" xlink:type="simple" xlink:show="embed" xlink:actuate="onLoad"/>
          <svg:title/>
          <svg:desc/>
        </draw:frame>
        <draw:frame draw:id="id252" draw:style-name="a1400" svg:x="5.66929in" svg:y="3.13858in" svg:width="2.28346in" svg:height="2.2834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406">
          <draw:frame draw:id="id253" draw:style-name="a1403" draw:name="Espaço Reservado para Número de Slide 6" svg:x="4.67953in" svg:y="11.10827in" svg:width="3.5878in" svg:height="0.58425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254" presentation:style-name="a1404" draw:name="Espaço Reservado para Imagem de Slide 1">
            <svg:title/>
            <svg:desc/>
          </draw:page-thumbnail>
          <draw:frame draw:id="id255" presentation:style-name="a140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07" draw:master-page-name="Master2-Layout7-blank-Em-branco" presentation:presentation-page-layout-name="Master2-PPL7" draw:id="Slide-267">
        <draw:frame draw:id="id256" presentation:style-name="a1410" draw:name="Título 1" svg:x="0.55118in" svg:y="0.6185in" svg:width="9.92087in" svg:height="1.03504in" presentation:class="title" presentation:placeholder="false">
          <draw:text-box>
            <text:p text:style-name="a1409" text:class-names="" text:cond-style-name=""><text:span text:style-name="a1408" text:class-names="">Tipos de Banco de dados</text:span></text:p>
          </draw:text-box>
          <svg:title/>
          <svg:desc/>
        </draw:frame>
        <draw:frame draw:id="id257" presentation:style-name="a1423" draw:name="Espaço Reservado para Texto 2" svg:x="0.55118in" svg:y="1.81102in" svg:width="9.92087in" svg:height="3.23583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Bancos de dados operacionais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Bancos de dados distribuídos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Bancos de dados externos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Data Warehouse e Data Mining</text:span></text:p>
              </text:list-item>
            </text:list>
          </draw:text-box>
          <svg:title/>
          <svg:desc/>
        </draw:frame>
        <presentation:notes draw:style-name="a1429">
          <draw:frame draw:id="id258" draw:style-name="a1426" draw:name="Espaço Reservado para Número de Slide 6" svg:x="4.67953in" svg:y="11.10827in" svg:width="3.5878in" svg:height="0.58425in">
            <draw:text-box>
              <text:p text:style-name="a1425" text:class-names="" text:cond-style-name=""><text:span text:style-name="a1424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59" presentation:style-name="a1427" draw:name="Espaço Reservado para Imagem de Slide 1">
            <svg:title/>
            <svg:desc/>
          </draw:page-thumbnail>
          <draw:frame draw:id="id260" presentation:style-name="a142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30" draw:master-page-name="Master2-Layout7-blank-Em-branco" presentation:presentation-page-layout-name="Master2-PPL7" draw:id="Slide-268">
        <draw:frame draw:id="id261" presentation:style-name="a1433" draw:name="Subtítulo 1" svg:x="0.55118in" svg:y="0.6185in" svg:width="9.92087in" svg:height="4.79921in" presentation:class="subtitle" presentation:placeholder="false">
          <draw:text-box>
            <text:p text:style-name="a1432" text:class-names="" text:cond-style-name=""><text:span text:style-name="a1431" text:class-names="">FUNDAMENTOS TÉCNICOS DO GERENCIAMENTO DE BANCO DE DADOS</text:span></text:p>
          </draw:text-box>
          <svg:title/>
          <svg:desc/>
        </draw:frame>
        <presentation:notes draw:style-name="a1439">
          <draw:frame draw:id="id262" draw:style-name="a1436" draw:name="Espaço Reservado para Número de Slide 6" svg:x="4.67953in" svg:y="11.10827in" svg:width="3.5878in" svg:height="0.58425in">
            <draw:text-box>
              <text:p text:style-name="a1435" text:class-names="" text:cond-style-name=""><text:span text:style-name="a1434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63" presentation:style-name="a1437" draw:name="Espaço Reservado para Imagem de Slide 1">
            <svg:title/>
            <svg:desc/>
          </draw:page-thumbnail>
          <draw:frame draw:id="id264" presentation:style-name="a143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40" draw:master-page-name="Master2-Layout7-blank-Em-branco" presentation:presentation-page-layout-name="Master2-PPL7" draw:id="Slide-269">
        <draw:frame draw:id="id265" presentation:style-name="a1443" draw:name="Subtítulo 1" svg:x="0.55118in" svg:y="0.6185in" svg:width="9.92087in" svg:height="4.79921in" presentation:class="subtitle" presentation:placeholder="false">
          <draw:text-box>
            <text:p text:style-name="a1442" text:class-names="" text:cond-style-name=""><text:span text:style-name="a1441" text:class-names="">O gerenciamento de Bancos de dados</text:span></text:p>
          </draw:text-box>
          <svg:title/>
          <svg:desc/>
        </draw:frame>
        <presentation:notes draw:style-name="a1449">
          <draw:frame draw:id="id266" draw:style-name="a1446" draw:name="Espaço Reservado para Número de Slide 6" svg:x="4.67953in" svg:y="11.10827in" svg:width="3.5878in" svg:height="0.58425in">
            <draw:text-box>
              <text:p text:style-name="a1445" text:class-names="" text:cond-style-name=""><text:span text:style-name="a1444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67" presentation:style-name="a1447" draw:name="Espaço Reservado para Imagem de Slide 1">
            <svg:title/>
            <svg:desc/>
          </draw:page-thumbnail>
          <draw:frame draw:id="id268" presentation:style-name="a144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50" draw:master-page-name="Master2-Layout7-blank-Em-branco" presentation:presentation-page-layout-name="Master2-PPL7" draw:id="Slide-270">
        <draw:frame draw:id="id269" presentation:style-name="a1453" draw:name="Título 1" svg:x="0.55118in" svg:y="0.6185in" svg:width="9.92087in" svg:height="1.03504in" presentation:class="title" presentation:placeholder="false">
          <draw:text-box>
            <text:p text:style-name="a1452" text:class-names="" text:cond-style-name=""><text:span text:style-name="a1451" text:class-names="">Caso Aetna</text:span></text:p>
          </draw:text-box>
          <svg:title/>
          <svg:desc/>
        </draw:frame>
        <draw:frame draw:id="id270" draw:style-name="a1454" svg:x="4.01575in" svg:y="2.12598in" svg:width="2.96693in" svg:height="2.9669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460">
          <draw:frame draw:id="id271" draw:style-name="a1457" draw:name="Espaço Reservado para Número de Slide 6" svg:x="4.67953in" svg:y="11.10827in" svg:width="3.5878in" svg:height="0.58425in">
            <draw:text-box>
              <text:p text:style-name="a1456" text:class-names="" text:cond-style-name=""><text:span text:style-name="a1455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72" presentation:style-name="a1458" draw:name="Espaço Reservado para Imagem de Slide 1">
            <svg:title/>
            <svg:desc/>
          </draw:page-thumbnail>
          <draw:frame draw:id="id273" presentation:style-name="a145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61" draw:master-page-name="Master2-Layout7-blank-Em-branco" presentation:presentation-page-layout-name="Master2-PPL7" draw:id="Slide-271">
        <draw:frame draw:id="id274" presentation:style-name="a1464" draw:name="Título 1" svg:x="0.55118in" svg:y="0.6185in" svg:width="9.92087in" svg:height="1.03504in" presentation:class="title" presentation:placeholder="false">
          <draw:text-box>
            <text:p text:style-name="a1463" text:class-names="" text:cond-style-name=""><text:span text:style-name="a1462" text:class-names="">Caso Boeing</text:span></text:p>
          </draw:text-box>
          <svg:title/>
          <svg:desc/>
        </draw:frame>
        <draw:frame draw:id="id275" draw:style-name="a1465" svg:x="1.5748in" svg:y="2.28346in" svg:width="7.92008in" svg:height="2.5984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471">
          <draw:frame draw:id="id276" draw:style-name="a1468" draw:name="Espaço Reservado para Número de Slide 6" svg:x="4.67953in" svg:y="11.10827in" svg:width="3.5878in" svg:height="0.58425in">
            <draw:text-box>
              <text:p text:style-name="a1467" text:class-names="" text:cond-style-name=""><text:span text:style-name="a1466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77" presentation:style-name="a1469" draw:name="Espaço Reservado para Imagem de Slide 1">
            <svg:title/>
            <svg:desc/>
          </draw:page-thumbnail>
          <draw:frame draw:id="id278" presentation:style-name="a147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72" draw:master-page-name="Master2-Layout7-blank-Em-branco" presentation:presentation-page-layout-name="Master2-PPL7" draw:id="Slide-272">
        <draw:frame draw:id="id279" presentation:style-name="a1475" draw:name="Título 1" svg:x="0.55118in" svg:y="0.6185in" svg:width="9.92087in" svg:height="1.03504in" presentation:class="title" presentation:placeholder="false">
          <draw:text-box>
            <text:p text:style-name="a1474" text:class-names="" text:cond-style-name=""><text:span text:style-name="a1473" text:class-names="">Estrutura de Bancos de Dados</text:span></text:p>
          </draw:text-box>
          <svg:title/>
          <svg:desc/>
        </draw:frame>
        <draw:frame draw:id="id280" presentation:style-name="a1491" draw:name="Espaço Reservado para Texto 2" svg:x="0.55118in" svg:y="1.81102in" svg:width="9.92087in" svg:height="3.23583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Estrutura Hierárquica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Estrutura em Rede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Estrutura Relacional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Estrutura Multidimensional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Estrutura Baseada em Objetos</text:span></text:p>
              </text:list-item>
            </text:list>
          </draw:text-box>
          <svg:title/>
          <svg:desc/>
        </draw:frame>
        <presentation:notes draw:style-name="a1497">
          <draw:frame draw:id="id281" draw:style-name="a1494" draw:name="Espaço Reservado para Número de Slide 6" svg:x="4.67953in" svg:y="11.10827in" svg:width="3.5878in" svg:height="0.58425in">
            <draw:text-box>
              <text:p text:style-name="a1493" text:class-names="" text:cond-style-name=""><text:span text:style-name="a1492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282" presentation:style-name="a1495" draw:name="Espaço Reservado para Imagem de Slide 1">
            <svg:title/>
            <svg:desc/>
          </draw:page-thumbnail>
          <draw:frame draw:id="id283" presentation:style-name="a149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498" draw:master-page-name="Master2-Layout7-blank-Em-branco" presentation:presentation-page-layout-name="Master2-PPL7" draw:id="Slide-273">
        <draw:frame draw:id="id284" presentation:style-name="a1501" draw:name="Subtítulo 1" svg:x="0.55118in" svg:y="0.6185in" svg:width="9.92087in" svg:height="4.79921in" presentation:class="subtitle" presentation:placeholder="false">
          <draw:text-box>
            <text:p text:style-name="a1500" text:class-names="" text:cond-style-name=""><text:span text:style-name="a1499" text:class-names="">Avaliação das Estruturas de Banco de Dados</text:span></text:p>
          </draw:text-box>
          <svg:title/>
          <svg:desc/>
        </draw:frame>
        <presentation:notes draw:style-name="a1507">
          <draw:frame draw:id="id285" draw:style-name="a1504" draw:name="Espaço Reservado para Número de Slide 6" svg:x="4.67953in" svg:y="11.10827in" svg:width="3.5878in" svg:height="0.58425in">
            <draw:text-box>
              <text:p text:style-name="a1503" text:class-names="" text:cond-style-name=""><text:span text:style-name="a1502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286" presentation:style-name="a1505" draw:name="Espaço Reservado para Imagem de Slide 1">
            <svg:title/>
            <svg:desc/>
          </draw:page-thumbnail>
          <draw:frame draw:id="id287" presentation:style-name="a150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08" draw:master-page-name="Master2-Layout7-blank-Em-branco" presentation:presentation-page-layout-name="Master2-PPL7" draw:id="Slide-274">
        <draw:frame draw:id="id288" presentation:style-name="a1511" draw:name="Subtítulo 1" svg:x="0.55118in" svg:y="0.6185in" svg:width="9.92087in" svg:height="4.79921in" presentation:class="subtitle" presentation:placeholder="false">
          <draw:text-box>
            <text:p text:style-name="a1510" text:class-names="" text:cond-style-name=""><text:span text:style-name="a1509" text:class-names="">Tecnologia Orientada a Objetos e a Web</text:span></text:p>
          </draw:text-box>
          <svg:title/>
          <svg:desc/>
        </draw:frame>
        <presentation:notes draw:style-name="a1517">
          <draw:frame draw:id="id289" draw:style-name="a1514" draw:name="Espaço Reservado para Número de Slide 6" svg:x="4.67953in" svg:y="11.10827in" svg:width="3.5878in" svg:height="0.58425in">
            <draw:text-box>
              <text:p text:style-name="a1513" text:class-names="" text:cond-style-name=""><text:span text:style-name="a1512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290" presentation:style-name="a1515" draw:name="Espaço Reservado para Imagem de Slide 1">
            <svg:title/>
            <svg:desc/>
          </draw:page-thumbnail>
          <draw:frame draw:id="id291" presentation:style-name="a151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518" draw:master-page-name="Master2-Layout7-blank-Em-branco" presentation:presentation-page-layout-name="Master2-PPL7" draw:id="Slide-275">
        <draw:frame draw:id="id292" presentation:style-name="a1525" draw:name="Subtítulo 1" svg:x="0.55118in" svg:y="0.6185in" svg:width="9.92087in" svg:height="4.79921in" presentation:class="subtitle" presentation:placeholder="false">
          <draw:text-box>
            <text:p text:style-name="a1520" text:class-names="" text:cond-style-name=""><text:span text:style-name="a1519" text:class-names="">Bancos de dados orientados a objetos</text:span></text:p>
            <text:p text:style-name="a1522" text:class-names="" text:cond-style-name=""><text:span text:style-name="a1521" text:class-names="">X</text:span></text:p>
            <text:p text:style-name="a1524" text:class-names="" text:cond-style-name=""><text:span text:style-name="a1523" text:class-names="">Bancos de dados relacionais</text:span></text:p>
          </draw:text-box>
          <svg:title/>
          <svg:desc/>
        </draw:frame>
        <presentation:notes draw:style-name="a1531">
          <draw:frame draw:id="id293" draw:style-name="a1528" draw:name="Espaço Reservado para Número de Slide 6" svg:x="4.67953in" svg:y="11.10827in" svg:width="3.5878in" svg:height="0.58425in">
            <draw:text-box>
              <text:p text:style-name="a1527" text:class-names="" text:cond-style-name=""><text:span text:style-name="a1526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294" presentation:style-name="a1529" draw:name="Espaço Reservado para Imagem de Slide 1">
            <svg:title/>
            <svg:desc/>
          </draw:page-thumbnail>
          <draw:frame draw:id="id295" presentation:style-name="a153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532" draw:master-page-name="Master2-Layout7-blank-Em-branco" presentation:presentation-page-layout-name="Master2-PPL7" draw:id="Slide-276">
        <draw:frame draw:id="id296" presentation:style-name="a1535" draw:name="Título 1" svg:x="0.55118in" svg:y="0.6185in" svg:width="9.92087in" svg:height="1.03504in" presentation:class="title" presentation:placeholder="false">
          <draw:text-box>
            <text:p text:style-name="a1534" text:class-names="" text:cond-style-name=""><text:span text:style-name="a1533" text:class-names="">Acessando Bancos de dados</text:span></text:p>
          </draw:text-box>
          <svg:title/>
          <svg:desc/>
        </draw:frame>
        <draw:frame draw:id="id297" presentation:style-name="a1548" draw:name="Espaço Reservado para Texto 2" svg:x="0.55118in" svg:y="1.81102in" svg:width="9.92087in" svg:height="3.23583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6" text:class-names="">Campos – chave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Acesso sequencial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Acesso direto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</draw:text-box>
          <svg:title/>
          <svg:desc/>
        </draw:frame>
        <presentation:notes draw:style-name="a1554">
          <draw:frame draw:id="id298" draw:style-name="a1551" draw:name="Espaço Reservado para Número de Slide 6" svg:x="4.67953in" svg:y="11.10827in" svg:width="3.5878in" svg:height="0.58425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299" presentation:style-name="a1552" draw:name="Espaço Reservado para Imagem de Slide 1">
            <svg:title/>
            <svg:desc/>
          </draw:page-thumbnail>
          <draw:frame draw:id="id300" presentation:style-name="a155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555" draw:master-page-name="Master2-Layout7-blank-Em-branco" presentation:presentation-page-layout-name="Master2-PPL7" draw:id="Slide-277">
        <draw:frame draw:id="id301" presentation:style-name="a1558" draw:name="Subtítulo 1" svg:x="0.55118in" svg:y="0.6185in" svg:width="9.92087in" svg:height="4.79921in" presentation:class="subtitle" presentation:placeholder="false">
          <draw:text-box>
            <text:p text:style-name="a1557" text:class-names="" text:cond-style-name=""><text:span text:style-name="a1556" text:class-names="">Desenvolvimento de Bancos de dados</text:span></text:p>
          </draw:text-box>
          <svg:title/>
          <svg:desc/>
        </draw:frame>
        <presentation:notes draw:style-name="a1564">
          <draw:frame draw:id="id302" draw:style-name="a1561" draw:name="Espaço Reservado para Número de Slide 6" svg:x="4.67953in" svg:y="11.10827in" svg:width="3.5878in" svg:height="0.58425in">
            <draw:text-box>
              <text:p text:style-name="a1560" text:class-names="" text:cond-style-name=""><text:span text:style-name="a1559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303" presentation:style-name="a1562" draw:name="Espaço Reservado para Imagem de Slide 1">
            <svg:title/>
            <svg:desc/>
          </draw:page-thumbnail>
          <draw:frame draw:id="id304" presentation:style-name="a156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565" draw:master-page-name="Master2-Layout7-blank-Em-branco" presentation:presentation-page-layout-name="Master2-PPL7" draw:id="Slide-278">
        <draw:frame draw:id="id305" presentation:style-name="a1568" draw:name="Subtítulo 1" svg:x="0.55118in" svg:y="0.6185in" svg:width="9.92087in" svg:height="4.79921in" presentation:class="subtitle" presentation:placeholder="false">
          <draw:text-box>
            <text:p text:style-name="a1567" text:class-names="" text:cond-style-name=""><text:span text:style-name="a1566" text:class-names="">Planejamento de Dados e Projeto de Banco de dados</text:span></text:p>
          </draw:text-box>
          <svg:title/>
          <svg:desc/>
        </draw:frame>
        <presentation:notes draw:style-name="a1574">
          <draw:frame draw:id="id306" draw:style-name="a1571" draw:name="Espaço Reservado para Número de Slide 6" svg:x="4.67953in" svg:y="11.10827in" svg:width="3.5878in" svg:height="0.58425in">
            <draw:text-box>
              <text:p text:style-name="a1570" text:class-names="" text:cond-style-name=""><text:span text:style-name="a1569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307" presentation:style-name="a1572" draw:name="Espaço Reservado para Imagem de Slide 1">
            <svg:title/>
            <svg:desc/>
          </draw:page-thumbnail>
          <draw:frame draw:id="id308" presentation:style-name="a157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575" draw:master-page-name="Master2-Layout7-blank-Em-branco" presentation:presentation-page-layout-name="Master2-PPL7" draw:id="Slide-279">
        <draw:frame draw:id="id309" presentation:style-name="a1578" draw:name="Título 1" svg:x="0.55118in" svg:y="0.6185in" svg:width="9.92087in" svg:height="1.03504in" presentation:class="title" presentation:placeholder="false">
          <draw:text-box>
            <text:p text:style-name="a1577" text:class-names="" text:cond-style-name=""><text:span text:style-name="a1576" text:class-names="">Referências bibliográficas</text:span></text:p>
          </draw:text-box>
          <svg:title/>
          <svg:desc/>
        </draw:frame>
        <draw:frame draw:id="id310" presentation:style-name="a1585" draw:name="Espaço Reservado para Texto 2" svg:x="0.55118in" svg:y="1.81102in" svg:width="9.92087in" svg:height="3.23583in" presentation:class="outline" presentation:placeholder="false">
          <draw:text-box>
            <text:list text:style-name="a1581">
              <text:list-item>
                <text:p text:style-name="a1580" text:class-names="" text:cond-style-name=""><text:span text:style-name="a1579" text:class-names="">O’Brien, James A., 1936-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Sistemas de informação e as decisões gerenciais na era da internet / James A. O’Brien; tradução: Célio Knipel Moreira e Cid Knipel Moreira. - 2. ed. - São Paulo: Saraiva, 2004</text:span></text:p>
              </text:list-item>
            </text:list>
          </draw:text-box>
          <svg:title/>
          <svg:desc/>
        </draw:frame>
        <presentation:notes draw:style-name="a1591">
          <draw:frame draw:id="id311" draw:style-name="a1588" draw:name="Espaço Reservado para Número de Slide 6" svg:x="4.67953in" svg:y="11.10827in" svg:width="3.5878in" svg:height="0.58425in">
            <draw:text-box>
              <text:p text:style-name="a1587" text:class-names="" text:cond-style-name=""><text:span text:style-name="a1586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312" presentation:style-name="a1589" draw:name="Espaço Reservado para Imagem de Slide 1">
            <svg:title/>
            <svg:desc/>
          </draw:page-thumbnail>
          <draw:frame draw:id="id313" presentation:style-name="a159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2" style:display-name="Título e Conteúdo">
      <presentation:placeholder presentation:object="title" svg:x="0in" svg:y="0.70866in" svg:width="9.92087in" svg:height="2.99213in"/>
      <presentation:placeholder presentation:object="object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4" style:display-name="Duas Partes de Conteúdo">
      <presentation:placeholder presentation:object="title" svg:x="0in" svg:y="0.70866in" svg:width="9.92087in" svg:height="2.99213in"/>
      <presentation:placeholder presentation:object="object" svg:x="4.17361in" svg:y="3.9375in" svg:width="2.78993in" svg:height="1.41667in"/>
      <presentation:placeholder presentation:object="object" svg:x="7.13021in" svg:y="3.9375in" svg:width="2.78993in" svg:height="1.41667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6" style:display-name="Somente Título">
      <presentation:placeholder presentation:object="title" svg:x="0in" svg:y="0.70866in" svg:width="9.92087in" svg:height="2.9921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7" style:display-name="Em branco"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0" style:display-name="Título e Texto Vertical">
      <presentation:placeholder presentation:object="title" svg:x="0in" svg:y="0.70866in" svg:width="9.92087in" svg:height="2.99213in"/>
      <presentation:placeholder presentation:object="outline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1" style:display-name="Texto e Título Vertical">
      <presentation:placeholder presentation:object="title" svg:x="7.44097in" svg:y="0.70833in" svg:width="2.47917in" svg:height="4.64583in"/>
      <presentation:placeholder presentation:object="outline" svg:x="0in" svg:y="0.70833in" svg:width="7.27431in" svg:height="4.6458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10236in" svg:y="5.9063in" svg:width="2.45in" svg:height="0.42717in"/>
    </style:presentation-page-layout>
    <style:presentation-page-layout style:name="Master2-PPL2" style:display-name="Título e Conteúdo">
      <presentation:placeholder presentation:object="title" svg:x="0.55118in" svg:y="0.6185in" svg:width="9.92087in" svg:height="1.03504in"/>
      <presentation:placeholder presentation:object="object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10236in" svg:y="5.9063in" svg:width="2.45in" svg:height="0.42717in"/>
    </style:presentation-page-layout>
    <style:presentation-page-layout style:name="Master2-PPL4" style:display-name="Duas Partes de Conteúdo">
      <presentation:placeholder presentation:object="title" svg:x="0.55118in" svg:y="0.6185in" svg:width="9.92087in" svg:height="1.03504in"/>
      <presentation:placeholder presentation:object="object" svg:x="0.55035in" svg:y="1.81076in" svg:width="4.87674in" svg:height="3.23611in"/>
      <presentation:placeholder presentation:object="object" svg:x="5.59375in" svg:y="1.81076in" svg:width="4.87847in" svg:height="3.23611in"/>
      <presentation:placeholder presentation:object="date-time" svg:x="1.10236in" svg:y="5.9063in" svg:width="2.45in" svg:height="0.42717in"/>
    </style:presentation-page-layout>
    <style:presentation-page-layout style:name="Master2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10236in" svg:y="5.9063in" svg:width="2.45in" svg:height="0.42717in"/>
    </style:presentation-page-layout>
    <style:presentation-page-layout style:name="Master2-PPL6" style:display-name="Somente Título">
      <presentation:placeholder presentation:object="title" svg:x="0.55118in" svg:y="0.6185in" svg:width="9.92087in" svg:height="1.03504in"/>
      <presentation:placeholder presentation:object="date-time" svg:x="1.10236in" svg:y="5.9063in" svg:width="2.45in" svg:height="0.42717in"/>
    </style:presentation-page-layout>
    <style:presentation-page-layout style:name="Master2-PPL7" style:display-name="Em branco">
      <presentation:placeholder presentation:object="date-time" svg:x="1.10236in" svg:y="5.9063in" svg:width="2.45in" svg:height="0.42717in"/>
    </style:presentation-page-layout>
    <style:presentation-page-layout style:name="Master2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10" style:display-name="Título e Texto Vertical">
      <presentation:placeholder presentation:object="title" svg:x="0.55118in" svg:y="0.6185in" svg:width="9.92087in" svg:height="1.03504in"/>
      <presentation:placeholder presentation:object="outline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11" style:display-name="Texto e Título Vertical">
      <presentation:placeholder presentation:object="title" svg:x="7.99306in" svg:y="0.61806in" svg:width="2.47917in" svg:height="4.42882in"/>
      <presentation:placeholder presentation:object="outline" svg:x="0.55035in" svg:y="0.61806in" svg:width="7.27604in" svg:height="4.42882in"/>
      <presentation:placeholder presentation:object="date-time" svg:x="1.10236in" svg:y="5.9063in" svg:width="2.45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solid" draw:fill-color="#c7243a" draw:opacity="100%" draw:stroke="non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solid" draw:fill-color="#c7243a" draw:opacity="100%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solid" draw:fill-color="#c7243a" draw:opacity="100%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solid" draw:fill-color="#c7243a" draw:opacity="100%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luminance="0%" draw:contrast="0%" draw:image-opacity="100%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solid" draw:fill-color="#c7243a" draw:opacity="100%" draw:stroke="none"/>
    </style:style>
    <style:style style:family="paragraph" style:name="a6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solid" draw:fill-color="#c7243a" draw:opacity="100%" draw:stroke="non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solid" draw:fill-color="#c7243a" draw:opacity="100%" draw:stroke="none"/>
    </style:style>
    <style:style style:family="paragraph" style:name="a53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solid" draw:fill-color="#c7243a" draw:opacity="100%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81" style:parent-style-name="Graphics">
      <style:graphic-properties draw:fill="none" fo:clip="rect(0in, 0in, 0in, 0in)" draw:stroke="none" draw:luminance="0%" draw:contrast="0%" draw:imag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c7243a" draw:opacity="100%" draw:stroke="non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solid" draw:fill-color="#c7243a" draw:opacity="100%" draw:stroke="non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">
      <style:graphic-properties draw:fill="solid" draw:fill-color="#c7243a" draw:opacity="100%" draw:stroke="non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solid" draw:fill-color="#c7243a" draw:opacity="100%" draw:stroke="non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solid" draw:fill-color="#c7243a" draw:opacity="100%" draw:stroke="non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draw:fill="solid" draw:fill-color="#c7243a" draw:opacity="100%" draw:stroke="non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solid" draw:fill-color="#c7243a" draw:opacity="100%" draw:stroke="non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draw:fill="solid" draw:fill-color="#c7243a" draw:opacity="100%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solid" draw:fill-color="#c7243a" draw:opacity="100%" draw:stroke="none"/>
    </style:style>
    <style:style style:family="presentation" style:name="a1107">
      <style:graphic-properties draw:fill="solid" draw:fill-color="#c7243a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solid" draw:fill-color="#c7243a" draw:opacity="100%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solid" draw:fill-color="#c7243a" draw:opacity="100%" draw:stroke="non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solid" draw:fill-color="#c7243a" draw:opacity="100%" draw:stroke="non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solid" draw:fill-color="#c7243a" draw:opacity="100%" draw:stroke="non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solid" draw:fill-color="#c7243a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draw:fill="solid" draw:fill-color="#c7243a" draw:opacity="100%" draw:stroke="non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1" presentation:style-name="a4" draw:name="Espaço Reservado para Título 2" svg:x="0in" svg:y="0.70866in" svg:width="9.92087in" svg:height="2.99213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Espaço Reservado para Texto 3" svg:x="4.17323in" svg:y="3.93701in" svg:width="5.74764in" svg:height="1.4173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Espaço Reservado para Data 4" svg:x="1.88976in" svg:y="5.77874in" svg:width="2.56811in" svg:height="0.4275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Espaço Reservado para Rodapé 5" svg:x="4.61614in" svg:y="5.76535in" svg:width="3.49409in" svg:height="0.427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Espaço Reservado para Número de Slide 6" svg:x="8.34646in" svg:y="5.76535in" svg:width="2.56811in" svg:height="0.427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Espaço Reservado para Imagem de Slide 1">
          <svg:title/>
          <svg:desc/>
        </draw:page-thumbnail>
        <draw:frame draw:id="id8" presentation:style-name="a35" draw:name="Espaço Reservado para Anotações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Espaço Reservado para Cabeçalho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Espaço Reservado para Data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Espaço Reservado para Rodapé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Espaço Reservado para Número de Slide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9">
      <draw:frame draw:id="id13" draw:layer="Master1-bg" draw:style-name="a50" draw:name="Imagem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14" draw:layer="Master1-bg" draw:style-name="a51" draw:name="Imagem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" presentation:style-name="a55" draw:name="Título 1" svg:x="1.37847in" svg:y="1.01563in" svg:width="8.26736in" svg:height="2.15799in" presentation:class="title" presentation:placeholder="false">
        <draw:text-box>
          <text:p text:style-name="a54" text:class-names="" text:cond-style-name=""><text:span text:style-name="a52" text:class-names="">Clique para editar o título mestre</text:span><text:span text:style-name="a53" text:class-names=""/></text:p>
        </draw:text-box>
        <svg:title/>
        <svg:desc/>
      </draw:frame>
      <draw:frame draw:id="id16" presentation:style-name="a59" draw:name="Subtítulo 2" svg:x="1.37847in" svg:y="3.25694in" svg:width="8.26736in" svg:height="1.49826in" presentation:class="subtitle" presentation:placeholder="false">
        <draw:text-box>
          <text:p text:style-name="a58" text:class-names="" text:cond-style-name=""><text:span text:style-name="a56" text:class-names="">Clique para editar o estilo do subtítulo Mestre</text:span><text:span text:style-name="a57" text:class-names=""/></text:p>
        </draw:text-box>
        <svg:title/>
        <svg:desc/>
      </draw:frame>
      <draw:frame draw:id="id17" presentation:style-name="a62" draw:name="Espaço Reservado para Data 3" svg:x="1.88976in" svg:y="5.77874in" svg:width="2.56811in" svg:height="0.42756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Espaço Reservado para Rodapé 4" svg:x="4.61614in" svg:y="5.76535in" svg:width="3.49409in" svg:height="0.42756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9" draw:name="Espaço Reservado para Número de Slide 5" svg:x="8.34646in" svg:y="5.76535in" svg:width="2.56811in" svg:height="0.42756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23622in" svg:y="0.88858in" svg:width="7.79449in" svg:height="4.38425in" presentation:class="page" draw:id="id7" presentation:style-name="a70" draw:name="Espaço Reservado para Imagem de Slide 1">
          <svg:title/>
          <svg:desc/>
        </draw:page-thumbnail>
        <draw:frame draw:id="id8" presentation:style-name="a73" draw:name="Espaço Reservado para Anotaçõe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ço Reservado para Cabeçalho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ço Reservado para Data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Espaço Reservado para Rodapé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Espaço Reservado para Número de Slide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7">
      <draw:frame draw:id="id20" draw:layer="Master1-bg" draw:style-name="a88" draw:name="Imagem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21" draw:layer="Master1-bg" draw:style-name="a89" draw:name="Imagem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22" presentation:style-name="a93" draw:name="Título 1" svg:x="0in" svg:y="0.70866in" svg:width="9.92087in" svg:height="2.99213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23" presentation:style-name="a109" draw:name="Espaço Reservado para Conteúdo 2" svg:x="4.17323in" svg:y="3.93701in" svg:width="5.74764in" svg:height="1.41732in" presentation:class="object" presentation:placeholder="false">
        <draw:text-box>
          <text:p text:style-name="a95" text:class-names="" text:cond-style-name=""><text:span text:style-name="a94" text:class-names="">Editar estilos de texto Mestre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gundo ní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Quinto ní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Espaço Reservado para Data 3" svg:x="1.88976in" svg:y="5.77874in" svg:width="2.56811in" svg:height="0.4275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Espaço Reservado para Rodapé 4" svg:x="4.61614in" svg:y="5.76535in" svg:width="3.49409in" svg:height="0.4275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9" draw:name="Espaço Reservado para Número de Slide 5" svg:x="8.34646in" svg:y="5.76535in" svg:width="2.56811in" svg:height="0.4275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7" presentation:style-name="a120" draw:name="Espaço Reservado para Imagem de Slide 1">
          <svg:title/>
          <svg:desc/>
        </draw:page-thumbnail>
        <draw:frame draw:id="id8" presentation:style-name="a123" draw:name="Espaço Reservado para Anotações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ço Reservado para Cabeçalho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ço Reservado para Data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Espaço Reservado para Rodapé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2" presentation:style-name="a135" draw:name="Espaço Reservado para Número de Slide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7">
      <draw:frame draw:id="id27" draw:layer="Master1-bg" draw:style-name="a138" draw:name="Imagem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28" draw:layer="Master1-bg" draw:style-name="a139" draw:name="Imagem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29" presentation:style-name="a143" draw:name="Título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0" text:class-names="">Clique para editar o título mestre</text:span><text:span text:style-name="a141" text:class-names=""/></text:p>
        </draw:text-box>
        <svg:title/>
        <svg:desc/>
      </draw:frame>
      <draw:frame draw:id="id30" presentation:style-name="a147" draw:name="Espaço Reservado para Texto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ar estilos de texto Mestre</text:span></text:p>
            </text:list-item>
          </text:list>
        </draw:text-box>
        <svg:title/>
        <svg:desc/>
      </draw:frame>
      <draw:frame draw:id="id31" presentation:style-name="a150" draw:name="Espaço Reservado para Data 3" svg:x="1.88976in" svg:y="5.77874in" svg:width="2.56811in" svg:height="0.42756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Espaço Reservado para Rodapé 4" svg:x="4.61614in" svg:y="5.76535in" svg:width="3.49409in" svg:height="0.42756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7" draw:name="Espaço Reservado para Número de Slide 5" svg:x="8.34646in" svg:y="5.76535in" svg:width="2.56811in" svg:height="0.42756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4">
        <draw:page-thumbnail svg:x="0.23622in" svg:y="0.88858in" svg:width="7.79449in" svg:height="4.38425in" presentation:class="page" draw:id="id7" presentation:style-name="a158" draw:name="Espaço Reservado para Imagem de Slide 1">
          <svg:title/>
          <svg:desc/>
        </draw:page-thumbnail>
        <draw:frame draw:id="id8" presentation:style-name="a161" draw:name="Espaço Reservado para Anotações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Espaço Reservado para Cabeçalho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Espaço Reservado para Data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1" presentation:style-name="a170" draw:name="Espaço Reservado para Rodapé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Espaço Reservado para Número de Slide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5">
      <draw:frame draw:id="id34" draw:layer="Master1-bg" draw:style-name="a176" draw:name="Imagem 7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35" draw:layer="Master1-bg" draw:style-name="a177" draw:name="Imagem 8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36" presentation:style-name="a181" draw:name="Título 1" svg:x="0in" svg:y="0.70866in" svg:width="9.92087in" svg:height="2.99213in" presentation:class="title" presentation:placeholder="false">
        <draw:text-box>
          <text:p text:style-name="a180" text:class-names="" text:cond-style-name=""><text:span text:style-name="a178" text:class-names="">Clique para editar o título mestre</text:span><text:span text:style-name="a179" text:class-names=""/></text:p>
        </draw:text-box>
        <svg:title/>
        <svg:desc/>
      </draw:frame>
      <draw:frame draw:id="id37" presentation:style-name="a197" draw:name="Espaço Reservado para Conteúdo 2" svg:x="4.17361in" svg:y="3.9375in" svg:width="2.78993in" svg:height="1.41667in" presentation:class="object" presentation:placeholder="false">
        <draw:text-box>
          <text:p text:style-name="a183" text:class-names="" text:cond-style-name=""><text:span text:style-name="a182" text:class-names="">Editar estilos de texto Mestre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í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3" draw:name="Espaço Reservado para Conteúdo 3" svg:x="7.13021in" svg:y="3.9375in" svg:width="2.78993in" svg:height="1.41667in" presentation:class="object" presentation:placeholder="false">
        <draw:text-box>
          <text:p text:style-name="a199" text:class-names="" text:cond-style-name=""><text:span text:style-name="a198" text:class-names="">Editar estilos de texto Mestr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í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í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6" draw:name="Espaço Reservado para Data 4" svg:x="1.88976in" svg:y="5.77874in" svg:width="2.56811in" svg:height="0.4275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ço Reservado para Rodapé 5" svg:x="4.61614in" svg:y="5.76535in" svg:width="3.49409in" svg:height="0.4275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1" presentation:style-name="a223" draw:name="Espaço Reservado para Número de Slide 6" svg:x="8.34646in" svg:y="5.76535in" svg:width="2.56811in" svg:height="0.4275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23622in" svg:y="0.88858in" svg:width="7.79449in" svg:height="4.38425in" presentation:class="page" draw:id="id7" presentation:style-name="a224" draw:name="Espaço Reservado para Imagem de Slide 1">
          <svg:title/>
          <svg:desc/>
        </draw:page-thumbnail>
        <draw:frame draw:id="id8" presentation:style-name="a227" draw:name="Espaço Reservado para Anotações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ço Reservado para Cabeçalho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ço Reservado para Data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Espaço Reservado para Rodapé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Espaço Reservado para Número de Slide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41">
      <draw:frame draw:id="id42" draw:layer="Master1-bg" draw:style-name="a242" draw:name="Imagem 9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43" draw:layer="Master1-bg" draw:style-name="a243" draw:name="Imagem 10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44" presentation:style-name="a247" draw:name="Título 1" svg:x="0.75868in" svg:y="0.32986in" svg:width="9.50868in" svg:height="1.19965in" presentation:class="title" presentation:placeholder="false">
        <draw:text-box>
          <text:p text:style-name="a246" text:class-names="" text:cond-style-name=""><text:span text:style-name="a244" text:class-names="">Clique para editar o título mestre</text:span><text:span text:style-name="a245" text:class-names=""/></text:p>
        </draw:text-box>
        <svg:title/>
        <svg:desc/>
      </draw:frame>
      <draw:frame draw:id="id45" presentation:style-name="a251" draw:name="Espaço Reservado para Texto 2" svg:x="0.75868in" svg:y="1.52083in" svg:width="4.66493in" svg:height="0.7447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Editar estilos de texto Mestre</text:span></text:p>
            </text:list-item>
          </text:list>
        </draw:text-box>
        <svg:title/>
        <svg:desc/>
      </draw:frame>
      <draw:frame draw:id="id46" presentation:style-name="a267" draw:name="Espaço Reservado para Conteúdo 3" svg:x="0.75868in" svg:y="2.26563in" svg:width="4.66493in" svg:height="3.3316in" presentation:class="object" presentation:placeholder="false">
        <draw:text-box>
          <text:p text:style-name="a253" text:class-names="" text:cond-style-name=""><text:span text:style-name="a252" text:class-names="">Editar estilos de texto Mestre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Quinto ní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1" draw:name="Espaço Reservado para Texto 4" svg:x="5.5816in" svg:y="1.52083in" svg:width="4.68576in" svg:height="0.74479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Editar estilos de texto Mestre</text:span></text:p>
            </text:list-item>
          </text:list>
        </draw:text-box>
        <svg:title/>
        <svg:desc/>
      </draw:frame>
      <draw:frame draw:id="id48" presentation:style-name="a287" draw:name="Espaço Reservado para Conteúdo 5" svg:x="5.5816in" svg:y="2.26563in" svg:width="4.68576in" svg:height="3.3316in" presentation:class="object" presentation:placeholder="false">
        <draw:text-box>
          <text:p text:style-name="a273" text:class-names="" text:cond-style-name=""><text:span text:style-name="a272" text:class-names="">Editar estilos de texto Mestr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gundo ní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Quinto ní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0" draw:name="Espaço Reservado para Data 6" svg:x="1.88976in" svg:y="5.77874in" svg:width="2.56811in" svg:height="0.42756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0" presentation:style-name="a293" draw:name="Espaço Reservado para Rodapé 7" svg:x="4.61614in" svg:y="5.76535in" svg:width="3.49409in" svg:height="0.42756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1" presentation:style-name="a297" draw:name="Espaço Reservado para Número de Slide 8" svg:x="8.34646in" svg:y="5.76535in" svg:width="2.56811in" svg:height="0.42756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7" presentation:style-name="a298" draw:name="Espaço Reservado para Imagem de Slide 1">
          <svg:title/>
          <svg:desc/>
        </draw:page-thumbnail>
        <draw:frame draw:id="id8" presentation:style-name="a301" draw:name="Espaço Reservado para Anotaçõe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Espaço Reservado para Cabeçalh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Espaço Reservado para Dat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1" presentation:style-name="a310" draw:name="Espaço Reservado para Rodapé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3" draw:name="Espaço Reservado para Número de Slide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5">
      <draw:frame draw:id="id52" draw:layer="Master1-bg" draw:style-name="a316" draw:name="Imagem 5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53" draw:layer="Master1-bg" draw:style-name="a317" draw:name="Imagem 6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54" presentation:style-name="a321" draw:name="Título 1" svg:x="0in" svg:y="0.70866in" svg:width="9.92087in" svg:height="2.99213in" presentation:class="title" presentation:placeholder="false">
        <draw:text-box>
          <text:p text:style-name="a320" text:class-names="" text:cond-style-name=""><text:span text:style-name="a318" text:class-names="">Clique para editar o título mestre</text:span><text:span text:style-name="a319" text:class-names=""/></text:p>
        </draw:text-box>
        <svg:title/>
        <svg:desc/>
      </draw:frame>
      <draw:frame draw:id="id55" presentation:style-name="a324" draw:name="Espaço Reservado para Data 2" svg:x="1.88976in" svg:y="5.77874in" svg:width="2.56811in" svg:height="0.4275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6" presentation:style-name="a327" draw:name="Espaço Reservado para Rodapé 3" svg:x="4.61614in" svg:y="5.76535in" svg:width="3.49409in" svg:height="0.42756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7" presentation:style-name="a331" draw:name="Espaço Reservado para Número de Slide 4" svg:x="8.34646in" svg:y="5.76535in" svg:width="2.56811in" svg:height="0.4275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23622in" svg:y="0.88858in" svg:width="7.79449in" svg:height="4.38425in" presentation:class="page" draw:id="id7" presentation:style-name="a332" draw:name="Espaço Reservado para Imagem de Slide 1">
          <svg:title/>
          <svg:desc/>
        </draw:page-thumbnail>
        <draw:frame draw:id="id8" presentation:style-name="a335" draw:name="Espaço Reservado para Anotações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Cabeçalho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Data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1" presentation:style-name="a344" draw:name="Espaço Reservado para Rodapé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7" draw:name="Espaço Reservado para Número de Slide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49">
      <draw:frame draw:id="id58" draw:layer="Master1-bg" draw:style-name="a350" draw:name="Imagem 4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59" draw:layer="Master1-bg" draw:style-name="a351" draw:name="Imagem 5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60" presentation:style-name="a354" draw:name="Espaço Reservado para Data 1" svg:x="1.88976in" svg:y="5.77874in" svg:width="2.56811in" svg:height="0.42756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1" presentation:style-name="a357" draw:name="Espaço Reservado para Rodapé 2" svg:x="4.61614in" svg:y="5.76535in" svg:width="3.49409in" svg:height="0.42756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2" presentation:style-name="a361" draw:name="Espaço Reservado para Número de Slide 3" svg:x="8.34646in" svg:y="5.76535in" svg:width="2.56811in" svg:height="0.42756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8">
        <draw:page-thumbnail svg:x="0.23622in" svg:y="0.88858in" svg:width="7.79449in" svg:height="4.38425in" presentation:class="page" draw:id="id7" presentation:style-name="a362" draw:name="Espaço Reservado para Imagem de Slide 1">
          <svg:title/>
          <svg:desc/>
        </draw:page-thumbnail>
        <draw:frame draw:id="id8" presentation:style-name="a365" draw:name="Espaço Reservado para Anotações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Espaço Reservado para Cabeçalho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Espaço Reservado para Data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1" presentation:style-name="a374" draw:name="Espaço Reservado para Rodapé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2" presentation:style-name="a377" draw:name="Espaço Reservado para Número de Slide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79">
      <draw:frame draw:id="id63" draw:layer="Master1-bg" draw:style-name="a380" draw:name="Imagem 7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64" draw:layer="Master1-bg" draw:style-name="a381" draw:name="Imagem 8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65" presentation:style-name="a385" draw:name="Título 1" svg:x="0.75868in" svg:y="0.41319in" svg:width="3.55556in" svg:height="1.44792in" presentation:class="title" presentation:placeholder="false">
        <draw:text-box>
          <text:p text:style-name="a384" text:class-names="" text:cond-style-name=""><text:span text:style-name="a382" text:class-names="">Clique para editar o título mestre</text:span><text:span text:style-name="a383" text:class-names=""/></text:p>
        </draw:text-box>
        <svg:title/>
        <svg:desc/>
      </draw:frame>
      <draw:frame draw:id="id66" presentation:style-name="a401" draw:name="Espaço Reservado para Conteúdo 2" svg:x="4.6875in" svg:y="0.89236in" svg:width="5.57986in" svg:height="4.40799in" presentation:class="object" presentation:placeholder="false">
        <draw:text-box>
          <text:p text:style-name="a387" text:class-names="" text:cond-style-name=""><text:span text:style-name="a386" text:class-names="">Editar estilos de texto Mestre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gundo ní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Quinto ní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5" draw:name="Espaço Reservado para Texto 3" svg:x="0.75868in" svg:y="1.86111in" svg:width="3.55556in" svg:height="3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ar estilos de texto Mestre</text:span></text:p>
            </text:list-item>
          </text:list>
        </draw:text-box>
        <svg:title/>
        <svg:desc/>
      </draw:frame>
      <draw:frame draw:id="id68" presentation:style-name="a408" draw:name="Espaço Reservado para Data 4" svg:x="1.88976in" svg:y="5.77874in" svg:width="2.56811in" svg:height="0.42756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9" presentation:style-name="a411" draw:name="Espaço Reservado para Rodapé 5" svg:x="4.61614in" svg:y="5.76535in" svg:width="3.49409in" svg:height="0.42756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70" presentation:style-name="a415" draw:name="Espaço Reservado para Número de Slide 6" svg:x="8.34646in" svg:y="5.76535in" svg:width="2.56811in" svg:height="0.42756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0.23622in" svg:y="0.88858in" svg:width="7.79449in" svg:height="4.38425in" presentation:class="page" draw:id="id7" presentation:style-name="a416" draw:name="Espaço Reservado para Imagem de Slide 1">
          <svg:title/>
          <svg:desc/>
        </draw:page-thumbnail>
        <draw:frame draw:id="id8" presentation:style-name="a419" draw:name="Espaço Reservado para Anotações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9" presentation:style-name="a422" draw:name="Espaço Reservado para Cabeçalho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Espaço Reservado para Data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Espaço Reservado para Rodapé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Espaço Reservado para Número de Slide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33">
      <draw:frame draw:id="id71" draw:layer="Master1-bg" draw:style-name="a434" draw:name="Imagem 7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72" draw:layer="Master1-bg" draw:style-name="a435" draw:name="Imagem 8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73" presentation:style-name="a439" draw:name="Título 1" svg:x="0.75868in" svg:y="0.41319in" svg:width="3.55556in" svg:height="1.44792in" presentation:class="title" presentation:placeholder="false">
        <draw:text-box>
          <text:p text:style-name="a438" text:class-names="" text:cond-style-name=""><text:span text:style-name="a436" text:class-names="">Clique para editar o título mestre</text:span><text:span text:style-name="a437" text:class-names=""/></text:p>
        </draw:text-box>
        <svg:title/>
        <svg:desc/>
      </draw:frame>
      <draw:frame draw:id="id74" presentation:style-name="a442" draw:name="Espaço Reservado para Imagem 2" svg:x="4.6875in" svg:y="0.89236in" svg:width="5.57986in" svg:height="4.40799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75" presentation:style-name="a446" draw:name="Espaço Reservado para Texto 3" svg:x="0.75868in" svg:y="1.86111in" svg:width="3.55556in" svg:height="3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ar estilos de texto Mestre</text:span></text:p>
            </text:list-item>
          </text:list>
        </draw:text-box>
        <svg:title/>
        <svg:desc/>
      </draw:frame>
      <draw:frame draw:id="id76" presentation:style-name="a449" draw:name="Espaço Reservado para Data 4" svg:x="1.88976in" svg:y="5.77874in" svg:width="2.56811in" svg:height="0.42756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7" presentation:style-name="a452" draw:name="Espaço Reservado para Rodapé 5" svg:x="4.61614in" svg:y="5.76535in" svg:width="3.49409in" svg:height="0.4275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8" presentation:style-name="a456" draw:name="Espaço Reservado para Número de Slide 6" svg:x="8.34646in" svg:y="5.76535in" svg:width="2.56811in" svg:height="0.4275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0.23622in" svg:y="0.88858in" svg:width="7.79449in" svg:height="4.38425in" presentation:class="page" draw:id="id7" presentation:style-name="a457" draw:name="Espaço Reservado para Imagem de Slide 1">
          <svg:title/>
          <svg:desc/>
        </draw:page-thumbnail>
        <draw:frame draw:id="id8" presentation:style-name="a460" draw:name="Espaço Reservado para Anotações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Espaço Reservado para Cabeçalho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Espaço Reservado para Data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69" draw:name="Espaço Reservado para Rodapé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Espaço Reservado para Número de Slide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74">
      <draw:frame draw:id="id79" draw:layer="Master1-bg" draw:style-name="a475" draw:name="Imagem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80" draw:layer="Master1-bg" draw:style-name="a476" draw:name="Imagem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81" presentation:style-name="a480" draw:name="Título 1" svg:x="0in" svg:y="0.70866in" svg:width="9.92087in" svg:height="2.99213in" presentation:class="title" presentation:placeholder="false">
        <draw:text-box>
          <text:p text:style-name="a479" text:class-names="" text:cond-style-name=""><text:span text:style-name="a477" text:class-names="">Clique para editar o título mestre</text:span><text:span text:style-name="a478" text:class-names=""/></text:p>
        </draw:text-box>
        <svg:title/>
        <svg:desc/>
      </draw:frame>
      <draw:frame draw:id="id82" presentation:style-name="a497" draw:name="Espaço Reservado para Texto Vertical 2" svg:x="4.17323in" svg:y="3.93701in" svg:width="5.74764in" svg:height="1.41732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ar estilos de texto Mestre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gundo ní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Quinto ní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00" draw:name="Espaço Reservado para Data 3" svg:x="1.88976in" svg:y="5.77874in" svg:width="2.56811in" svg:height="0.42756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84" presentation:style-name="a503" draw:name="Espaço Reservado para Rodapé 4" svg:x="4.61614in" svg:y="5.76535in" svg:width="3.49409in" svg:height="0.42756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85" presentation:style-name="a507" draw:name="Espaço Reservado para Número de Slide 5" svg:x="8.34646in" svg:y="5.76535in" svg:width="2.56811in" svg:height="0.42756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23622in" svg:y="0.88858in" svg:width="7.79449in" svg:height="4.38425in" presentation:class="page" draw:id="id7" presentation:style-name="a508" draw:name="Espaço Reservado para Imagem de Slide 1">
          <svg:title/>
          <svg:desc/>
        </draw:page-thumbnail>
        <draw:frame draw:id="id8" presentation:style-name="a511" draw:name="Espaço Reservado para Anotações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Espaço Reservado para Cabeçalho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Espaço Reservado para Data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Espaço Reservado para Rodapé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Espaço Reservado para Número de Slide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25">
      <draw:frame draw:id="id86" draw:layer="Master1-bg" draw:style-name="a526" draw:name="Imagem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87" draw:layer="Master1-bg" draw:style-name="a527" draw:name="Imagem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88" presentation:style-name="a531" draw:name="Título Vertical 1" svg:x="7.44097in" svg:y="0.70833in" svg:width="2.47917in" svg:height="4.64583in" presentation:class="title" presentation:placeholder="false">
        <draw:text-box>
          <text:p text:style-name="a530" text:class-names="" text:cond-style-name=""><text:span text:style-name="a528" text:class-names="">Clique para editar o título mestre</text:span><text:span text:style-name="a529" text:class-names=""/></text:p>
        </draw:text-box>
        <svg:title/>
        <svg:desc/>
      </draw:frame>
      <draw:frame draw:id="id89" presentation:style-name="a548" draw:name="Espaço Reservado para Texto Vertical 2" svg:x="0in" svg:y="0.70833in" svg:width="7.27431in" svg:height="4.6458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Editar estilos de texto Mestr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gundo ní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Quinto ní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51" draw:name="Espaço Reservado para Data 3" svg:x="1.88976in" svg:y="5.77874in" svg:width="2.56811in" svg:height="0.42756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1" presentation:style-name="a554" draw:name="Espaço Reservado para Rodapé 4" svg:x="4.61614in" svg:y="5.76535in" svg:width="3.49409in" svg:height="0.42756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2" presentation:style-name="a558" draw:name="Espaço Reservado para Número de Slide 5" svg:x="8.34646in" svg:y="5.76535in" svg:width="2.56811in" svg:height="0.42756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5">
        <draw:page-thumbnail svg:x="0.23622in" svg:y="0.88858in" svg:width="7.79449in" svg:height="4.38425in" presentation:class="page" draw:id="id7" presentation:style-name="a559" draw:name="Espaço Reservado para Imagem de Slide 1">
          <svg:title/>
          <svg:desc/>
        </draw:page-thumbnail>
        <draw:frame draw:id="id8" presentation:style-name="a562" draw:name="Espaço Reservado para Anotações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Espaço Reservado para Cabeçalho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Espaço Reservado para Data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Espaço Reservado para Rodapé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Espaço Reservado para Número de Slide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76">
      <draw:frame draw:id="id93" draw:style-name="a577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94" draw:style-name="a578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95" presentation:style-name="a581" draw:name="Espaço Reservado para Título 3" svg:x="0.55118in" svg:y="0.6185in" svg:width="9.92087in" svg:height="1.03504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6" presentation:style-name="a598" draw:name="Espaço Reservado para Texto 4" svg:x="0.55118in" svg:y="1.81102in" svg:width="9.92087in" svg:height="3.2358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Editar estilos de texto Mestre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gundo ní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Quinto ní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01" draw:name="Espaço Reservado para Data 5" svg:x="1.10236in" svg:y="5.9063in" svg:width="2.45in" svg:height="0.42717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98" draw:style-name="a604" draw:name="CaixaDeTexto 6" svg:x="1.89016in" svg:y="5.90591in" svg:width="2.56811in" svg:height="0.42756in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99" draw:style-name="a607" draw:name="CaixaDeTexto 7" svg:x="4.61654in" svg:y="5.90591in" svg:width="3.49409in" svg:height="0.42756in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00" draw:style-name="a610" draw:name="CaixaDeTexto 8" svg:x="8.37677in" svg:y="5.90591in" svg:width="2.56811in" svg:height="0.42756in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27">
        <draw:page-thumbnail svg:x="0.23622in" svg:y="0.88858in" svg:width="7.79449in" svg:height="4.38425in" presentation:class="page" draw:id="id7" presentation:style-name="a611" draw:name="Espaço Reservado para Imagem de Slide 1">
          <svg:title/>
          <svg:desc/>
        </draw:page-thumbnail>
        <draw:frame draw:id="id8" presentation:style-name="a614" draw:name="Espaço Reservado para Anotações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Espaço Reservado para Cabeçalho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Espaço Reservado para Data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Espaço Reservado para Rodapé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2" presentation:style-name="a626" draw:name="Espaço Reservado para Número de Slide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628">
      <draw:frame draw:id="id101" draw:layer="Master2-bg" draw:style-name="a629" draw:name="Imagem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02" draw:layer="Master2-bg" draw:style-name="a630" draw:name="Imagem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03" draw:layer="Master2-bg" draw:style-name="a633" draw:name="CaixaDeTexto 6" svg:x="1.89016in" svg:y="5.90591in" svg:width="2.56811in" svg:height="0.42756in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104" draw:layer="Master2-bg" draw:style-name="a636" draw:name="CaixaDeTexto 7" svg:x="4.61654in" svg:y="5.90591in" svg:width="3.49409in" svg:height="0.42756in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05" draw:layer="Master2-bg" draw:style-name="a639" draw:name="CaixaDeTexto 8" svg:x="8.37677in" svg:y="5.90591in" svg:width="2.56811in" svg:height="0.42756in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frame draw:id="id106" presentation:style-name="a643" draw:name="Título 1" svg:x="1.37847in" svg:y="1.01563in" svg:width="8.26736in" svg:height="2.15799in" presentation:class="title" presentation:placeholder="false">
        <draw:text-box>
          <text:p text:style-name="a642" text:class-names="" text:cond-style-name=""><text:span text:style-name="a640" text:class-names="">Clique para editar o título mestre</text:span><text:span text:style-name="a641" text:class-names=""/></text:p>
        </draw:text-box>
        <svg:title/>
        <svg:desc/>
      </draw:frame>
      <draw:frame draw:id="id107" presentation:style-name="a647" draw:name="Subtítulo 2" svg:x="1.37847in" svg:y="3.25694in" svg:width="8.26736in" svg:height="1.49826in" presentation:class="subtitle" presentation:placeholder="false">
        <draw:text-box>
          <text:p text:style-name="a646" text:class-names="" text:cond-style-name=""><text:span text:style-name="a644" text:class-names="">Clique para editar o estilo do subtítulo Mestre</text:span><text:span text:style-name="a645" text:class-names=""/></text:p>
        </draw:text-box>
        <svg:title/>
        <svg:desc/>
      </draw:frame>
      <draw:frame draw:id="id108" presentation:style-name="a650" draw:name="Espaço Reservado para Data 3" svg:x="1.10236in" svg:y="5.9063in" svg:width="2.45in" svg:height="0.42717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presentation:notes style:page-layout-name="pageLayout2" draw:style-name="a667">
        <draw:page-thumbnail svg:x="0.23622in" svg:y="0.88858in" svg:width="7.79449in" svg:height="4.38425in" presentation:class="page" draw:id="id7" presentation:style-name="a651" draw:name="Espaço Reservado para Imagem de Slide 1">
          <svg:title/>
          <svg:desc/>
        </draw:page-thumbnail>
        <draw:frame draw:id="id8" presentation:style-name="a654" draw:name="Espaço Reservado para Anotações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7" draw:name="Espaço Reservado para Cabeçalho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" presentation:style-name="a660" draw:name="Espaço Reservado para Data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3" draw:name="Espaço Reservado para Rodapé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2" presentation:style-name="a666" draw:name="Espaço Reservado para Número de Slide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68">
      <draw:frame draw:id="id109" draw:layer="Master2-bg" draw:style-name="a669" draw:name="Imagem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0" draw:layer="Master2-bg" draw:style-name="a670" draw:name="Imagem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1" draw:layer="Master2-bg" draw:style-name="a673" draw:name="CaixaDeTexto 6" svg:x="1.89016in" svg:y="5.90591in" svg:width="2.56811in" svg:height="0.42756in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112" draw:layer="Master2-bg" draw:style-name="a676" draw:name="CaixaDeTexto 7" svg:x="4.61654in" svg:y="5.90591in" svg:width="3.49409in" svg:height="0.42756in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13" draw:layer="Master2-bg" draw:style-name="a679" draw:name="CaixaDeTexto 8" svg:x="8.37677in" svg:y="5.90591in" svg:width="2.56811in" svg:height="0.42756in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draw:frame draw:id="id114" presentation:style-name="a683" draw:name="Título 1" svg:x="0.55118in" svg:y="0.6185in" svg:width="9.92087in" svg:height="1.03504in" presentation:class="title" presentation:placeholder="false">
        <draw:text-box>
          <text:p text:style-name="a682" text:class-names="" text:cond-style-name=""><text:span text:style-name="a680" text:class-names="">Clique para editar o título mestre</text:span><text:span text:style-name="a681" text:class-names=""/></text:p>
        </draw:text-box>
        <svg:title/>
        <svg:desc/>
      </draw:frame>
      <draw:frame draw:id="id115" presentation:style-name="a699" draw:name="Espaço Reservado para Conteúdo 2" svg:x="0.55118in" svg:y="1.81102in" svg:width="9.92087in" svg:height="3.23583in" presentation:class="object" presentation:placeholder="false">
        <draw:text-box>
          <text:p text:style-name="a685" text:class-names="" text:cond-style-name=""><text:span text:style-name="a684" text:class-names="">Editar estilos de texto Mestre</text:span></text:p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gundo ní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5" text:class-names="">Quinto nível</text:span><text:span text:style-name="a6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02" draw:name="Espaço Reservado para Data 3" svg:x="1.10236in" svg:y="5.9063in" svg:width="2.45in" svg:height="0.42717in" presentation:class="date-tim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presentation:notes style:page-layout-name="pageLayout2" draw:style-name="a719">
        <draw:page-thumbnail svg:x="0.23622in" svg:y="0.88858in" svg:width="7.79449in" svg:height="4.38425in" presentation:class="page" draw:id="id7" presentation:style-name="a703" draw:name="Espaço Reservado para Imagem de Slide 1">
          <svg:title/>
          <svg:desc/>
        </draw:page-thumbnail>
        <draw:frame draw:id="id8" presentation:style-name="a706" draw:name="Espaço Reservado para Anotações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Espaço Reservado para Cabeçalho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Espaço Reservado para Data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Espaço Reservado para Rodapé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2" presentation:style-name="a718" draw:name="Espaço Reservado para Número de Slide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720">
      <draw:frame draw:id="id117" draw:layer="Master2-bg" draw:style-name="a721" draw:name="Imagem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8" draw:layer="Master2-bg" draw:style-name="a722" draw:name="Imagem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9" draw:layer="Master2-bg" draw:style-name="a725" draw:name="CaixaDeTexto 6" svg:x="1.89016in" svg:y="5.90591in" svg:width="2.56811in" svg:height="0.42756in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0" draw:layer="Master2-bg" draw:style-name="a728" draw:name="CaixaDeTexto 7" svg:x="4.61654in" svg:y="5.90591in" svg:width="3.49409in" svg:height="0.42756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1" draw:layer="Master2-bg" draw:style-name="a731" draw:name="CaixaDeTexto 8" svg:x="8.37677in" svg:y="5.90591in" svg:width="2.56811in" svg:height="0.42756in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draw:frame draw:id="id122" presentation:style-name="a735" draw:name="Título 1" svg:x="0.75174in" svg:y="1.54688in" svg:width="9.50868in" svg:height="2.57812in" presentation:class="title" presentation:placeholder="false">
        <draw:text-box>
          <text:p text:style-name="a734" text:class-names="" text:cond-style-name=""><text:span text:style-name="a732" text:class-names="">Clique para editar o título mestre</text:span><text:span text:style-name="a733" text:class-names=""/></text:p>
        </draw:text-box>
        <svg:title/>
        <svg:desc/>
      </draw:frame>
      <draw:frame draw:id="id123" presentation:style-name="a739" draw:name="Espaço Reservado para Texto 2" svg:x="0.75174in" svg:y="4.14931in" svg:width="9.50868in" svg:height="1.3576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ar estilos de texto Mestre</text:span></text:p>
            </text:list-item>
          </text:list>
        </draw:text-box>
        <svg:title/>
        <svg:desc/>
      </draw:frame>
      <draw:frame draw:id="id124" presentation:style-name="a742" draw:name="Espaço Reservado para Data 3" svg:x="1.10236in" svg:y="5.9063in" svg:width="2.45in" svg:height="0.42717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7" presentation:style-name="a743" draw:name="Espaço Reservado para Imagem de Slide 1">
          <svg:title/>
          <svg:desc/>
        </draw:page-thumbnail>
        <draw:frame draw:id="id8" presentation:style-name="a746" draw:name="Espaço Reservado para Anotações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Espaço Reservado para Cabeçalho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Espaço Reservado para Data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1" presentation:style-name="a755" draw:name="Espaço Reservado para Rodapé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2" presentation:style-name="a758" draw:name="Espaço Reservado para Número de Slide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60">
      <draw:frame draw:id="id125" draw:layer="Master2-bg" draw:style-name="a761" draw:name="Imagem 5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26" draw:layer="Master2-bg" draw:style-name="a762" draw:name="Imagem 6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27" draw:layer="Master2-bg" draw:style-name="a765" draw:name="CaixaDeTexto 7" svg:x="1.89016in" svg:y="5.90591in" svg:width="2.56811in" svg:height="0.42756in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28" draw:layer="Master2-bg" draw:style-name="a768" draw:name="CaixaDeTexto 8" svg:x="4.61654in" svg:y="5.90591in" svg:width="3.49409in" svg:height="0.42756in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29" draw:layer="Master2-bg" draw:style-name="a771" draw:name="CaixaDeTexto 9" svg:x="8.37677in" svg:y="5.90591in" svg:width="2.56811in" svg:height="0.42756in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draw:frame draw:id="id130" presentation:style-name="a775" draw:name="Título 1" svg:x="0.55118in" svg:y="0.6185in" svg:width="9.92087in" svg:height="1.03504in" presentation:class="title" presentation:placeholder="false">
        <draw:text-box>
          <text:p text:style-name="a774" text:class-names="" text:cond-style-name=""><text:span text:style-name="a772" text:class-names="">Clique para editar o título mestre</text:span><text:span text:style-name="a773" text:class-names=""/></text:p>
        </draw:text-box>
        <svg:title/>
        <svg:desc/>
      </draw:frame>
      <draw:frame draw:id="id131" presentation:style-name="a791" draw:name="Espaço Reservado para Conteúdo 2" svg:x="0.55035in" svg:y="1.81076in" svg:width="4.87674in" svg:height="3.23611in" presentation:class="object" presentation:placeholder="false">
        <draw:text-box>
          <text:p text:style-name="a777" text:class-names="" text:cond-style-name=""><text:span text:style-name="a776" text:class-names="">Editar estilos de texto Mestre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gundo ní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Quinto ní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07" draw:name="Espaço Reservado para Conteúdo 3" svg:x="5.59375in" svg:y="1.81076in" svg:width="4.87847in" svg:height="3.23611in" presentation:class="object" presentation:placeholder="false">
        <draw:text-box>
          <text:p text:style-name="a793" text:class-names="" text:cond-style-name=""><text:span text:style-name="a792" text:class-names="">Editar estilos de texto Mestre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gundo ní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Quinto ní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10" draw:name="Espaço Reservado para Data 4" svg:x="1.10236in" svg:y="5.9063in" svg:width="2.45in" svg:height="0.42717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presentation:notes style:page-layout-name="pageLayout2" draw:style-name="a827">
        <draw:page-thumbnail svg:x="0.23622in" svg:y="0.88858in" svg:width="7.79449in" svg:height="4.38425in" presentation:class="page" draw:id="id7" presentation:style-name="a811" draw:name="Espaço Reservado para Imagem de Slide 1">
          <svg:title/>
          <svg:desc/>
        </draw:page-thumbnail>
        <draw:frame draw:id="id8" presentation:style-name="a814" draw:name="Espaço Reservado para Anotações 2" svg:x="0.82677in" svg:y="5.55394in" svg:width="6.61378in" svg:height="5.26142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7" draw:name="Espaço Reservado para Cabeçalho 3" svg:x="0in" svg:y="0in" svg:width="3.5878in" svg:height="0.5842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0" presentation:style-name="a820" draw:name="Espaço Reservado para Data 4" svg:x="4.67953in" svg:y="0in" svg:width="3.5878in" svg:height="0.58425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1" presentation:style-name="a823" draw:name="Espaço Reservado para Rodapé 5" svg:x="0in" svg:y="11.10827in" svg:width="3.5878in" svg:height="0.58425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2" presentation:style-name="a826" draw:name="Espaço Reservado para Número de Slide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828">
      <draw:frame draw:id="id134" draw:layer="Master2-bg" draw:style-name="a829" draw:name="Imagem 7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35" draw:layer="Master2-bg" draw:style-name="a830" draw:name="Imagem 8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36" draw:layer="Master2-bg" draw:style-name="a833" draw:name="CaixaDeTexto 9" svg:x="1.89016in" svg:y="5.90591in" svg:width="2.56811in" svg:height="0.42756in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7" draw:layer="Master2-bg" draw:style-name="a836" draw:name="CaixaDeTexto 10" svg:x="4.61654in" svg:y="5.90591in" svg:width="3.49409in" svg:height="0.42756in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38" draw:layer="Master2-bg" draw:style-name="a839" draw:name="CaixaDeTexto 11" svg:x="8.37677in" svg:y="5.90591in" svg:width="2.56811in" svg:height="0.42756in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draw:frame draw:id="id139" presentation:style-name="a843" draw:name="Título 1" svg:x="0.75868in" svg:y="0.32986in" svg:width="9.50868in" svg:height="1.19965in" presentation:class="title" presentation:placeholder="false">
        <draw:text-box>
          <text:p text:style-name="a842" text:class-names="" text:cond-style-name=""><text:span text:style-name="a840" text:class-names="">Clique para editar o título mestre</text:span><text:span text:style-name="a841" text:class-names=""/></text:p>
        </draw:text-box>
        <svg:title/>
        <svg:desc/>
      </draw:frame>
      <draw:frame draw:id="id140" presentation:style-name="a847" draw:name="Espaço Reservado para Texto 2" svg:x="0.75868in" svg:y="1.52083in" svg:width="4.66493in" svg:height="0.7447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Editar estilos de texto Mestre</text:span></text:p>
            </text:list-item>
          </text:list>
        </draw:text-box>
        <svg:title/>
        <svg:desc/>
      </draw:frame>
      <draw:frame draw:id="id141" presentation:style-name="a863" draw:name="Espaço Reservado para Conteúdo 3" svg:x="0.75868in" svg:y="2.26563in" svg:width="4.66493in" svg:height="3.3316in" presentation:class="object" presentation:placeholder="false">
        <draw:text-box>
          <text:p text:style-name="a849" text:class-names="" text:cond-style-name=""><text:span text:style-name="a848" text:class-names="">Editar estilos de texto Mestre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gundo nível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Quinto nível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67" draw:name="Espaço Reservado para Texto 4" svg:x="5.5816in" svg:y="1.52083in" svg:width="4.68576in" svg:height="0.74479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Editar estilos de texto Mestre</text:span></text:p>
            </text:list-item>
          </text:list>
        </draw:text-box>
        <svg:title/>
        <svg:desc/>
      </draw:frame>
      <draw:frame draw:id="id143" presentation:style-name="a883" draw:name="Espaço Reservado para Conteúdo 5" svg:x="5.5816in" svg:y="2.26563in" svg:width="4.68576in" svg:height="3.3316in" presentation:class="object" presentation:placeholder="false">
        <draw:text-box>
          <text:p text:style-name="a869" text:class-names="" text:cond-style-name=""><text:span text:style-name="a868" text:class-names="">Editar estilos de texto Mestre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gundo nível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Quinto nível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86" draw:name="Espaço Reservado para Data 6" svg:x="1.10236in" svg:y="5.9063in" svg:width="2.45in" svg:height="0.42717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presentation:notes style:page-layout-name="pageLayout2" draw:style-name="a903">
        <draw:page-thumbnail svg:x="0.23622in" svg:y="0.88858in" svg:width="7.79449in" svg:height="4.38425in" presentation:class="page" draw:id="id7" presentation:style-name="a887" draw:name="Espaço Reservado para Imagem de Slide 1">
          <svg:title/>
          <svg:desc/>
        </draw:page-thumbnail>
        <draw:frame draw:id="id8" presentation:style-name="a890" draw:name="Espaço Reservado para Anotações 2" svg:x="0.82677in" svg:y="5.55394in" svg:width="6.61378in" svg:height="5.26142in" presentation:class="notes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9" presentation:style-name="a893" draw:name="Espaço Reservado para Cabeçalho 3" svg:x="0in" svg:y="0in" svg:width="3.5878in" svg:height="0.58425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0" presentation:style-name="a896" draw:name="Espaço Reservado para Data 4" svg:x="4.67953in" svg:y="0in" svg:width="3.5878in" svg:height="0.58425in" presentation:class="date-time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1" presentation:style-name="a899" draw:name="Espaço Reservado para Rodapé 5" svg:x="0in" svg:y="11.10827in" svg:width="3.5878in" svg:height="0.5842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2" presentation:style-name="a902" draw:name="Espaço Reservado para Número de Slide 6" svg:x="4.67953in" svg:y="11.10827in" svg:width="3.5878in" svg:height="0.5842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904">
      <draw:frame draw:id="id145" draw:layer="Master2-bg" draw:style-name="a905" draw:name="Imagem 3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46" draw:layer="Master2-bg" draw:style-name="a906" draw:name="Imagem 4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47" draw:layer="Master2-bg" draw:style-name="a909" draw:name="CaixaDeTexto 5" svg:x="1.89016in" svg:y="5.90591in" svg:width="2.56811in" svg:height="0.42756in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48" draw:layer="Master2-bg" draw:style-name="a912" draw:name="CaixaDeTexto 6" svg:x="4.61654in" svg:y="5.90591in" svg:width="3.49409in" svg:height="0.42756in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49" draw:layer="Master2-bg" draw:style-name="a915" draw:name="CaixaDeTexto 7" svg:x="8.37677in" svg:y="5.90591in" svg:width="2.56811in" svg:height="0.42756in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draw:frame draw:id="id150" presentation:style-name="a919" draw:name="Título 1" svg:x="0.55118in" svg:y="0.6185in" svg:width="9.92087in" svg:height="1.03504in" presentation:class="title" presentation:placeholder="false">
        <draw:text-box>
          <text:p text:style-name="a918" text:class-names="" text:cond-style-name=""><text:span text:style-name="a916" text:class-names="">Clique para editar o título mestre</text:span><text:span text:style-name="a917" text:class-names=""/></text:p>
        </draw:text-box>
        <svg:title/>
        <svg:desc/>
      </draw:frame>
      <draw:frame draw:id="id151" presentation:style-name="a922" draw:name="Espaço Reservado para Data 2" svg:x="1.10236in" svg:y="5.9063in" svg:width="2.45in" svg:height="0.42717in" presentation:class="date-time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presentation:notes style:page-layout-name="pageLayout2" draw:style-name="a939">
        <draw:page-thumbnail svg:x="0.23622in" svg:y="0.88858in" svg:width="7.79449in" svg:height="4.38425in" presentation:class="page" draw:id="id7" presentation:style-name="a923" draw:name="Espaço Reservado para Imagem de Slide 1">
          <svg:title/>
          <svg:desc/>
        </draw:page-thumbnail>
        <draw:frame draw:id="id8" presentation:style-name="a926" draw:name="Espaço Reservado para Anotações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Espaço Reservado para Cabeçalho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Espaço Reservado para Data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1" presentation:style-name="a935" draw:name="Espaço Reservado para Rodapé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2" presentation:style-name="a938" draw:name="Espaço Reservado para Número de Slide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40">
      <draw:frame draw:id="id152" draw:layer="Master2-bg" draw:style-name="a941" draw:name="Imagem 2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3" draw:layer="Master2-bg" draw:style-name="a942" draw:name="Imagem 3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2-bg" draw:style-name="a945" draw:name="CaixaDeTexto 4" svg:x="1.89016in" svg:y="5.90591in" svg:width="2.56811in" svg:height="0.42756in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55" draw:layer="Master2-bg" draw:style-name="a948" draw:name="CaixaDeTexto 5" svg:x="4.61654in" svg:y="5.90591in" svg:width="3.49409in" svg:height="0.42756in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56" draw:layer="Master2-bg" draw:style-name="a951" draw:name="CaixaDeTexto 6" svg:x="8.37677in" svg:y="5.90591in" svg:width="2.56811in" svg:height="0.42756in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draw:frame draw:id="id157" presentation:style-name="a954" draw:name="Espaço Reservado para Data 1" svg:x="1.10236in" svg:y="5.9063in" svg:width="2.45in" svg:height="0.42717in" presentation:class="date-tim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7" presentation:style-name="a955" draw:name="Espaço Reservado para Imagem de Slide 1">
          <svg:title/>
          <svg:desc/>
        </draw:page-thumbnail>
        <draw:frame draw:id="id8" presentation:style-name="a958" draw:name="Espaço Reservado para Anotaçõe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9" presentation:style-name="a961" draw:name="Espaço Reservado para Cabeçalh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0" presentation:style-name="a964" draw:name="Espaço Reservado para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1" presentation:style-name="a967" draw:name="Espaço Reservado para Rodapé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2" presentation:style-name="a970" draw:name="Espaço Reservado para Número de Slide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72">
      <draw:frame draw:id="id158" draw:layer="Master2-bg" draw:style-name="a973" draw:name="Imagem 5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9" draw:layer="Master2-bg" draw:style-name="a974" draw:name="Imagem 6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60" draw:layer="Master2-bg" draw:style-name="a977" draw:name="CaixaDeTexto 7" svg:x="1.89016in" svg:y="5.90591in" svg:width="2.56811in" svg:height="0.42756in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61" draw:layer="Master2-bg" draw:style-name="a980" draw:name="CaixaDeTexto 8" svg:x="4.61654in" svg:y="5.90591in" svg:width="3.49409in" svg:height="0.42756in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2" draw:layer="Master2-bg" draw:style-name="a983" draw:name="CaixaDeTexto 9" svg:x="8.37677in" svg:y="5.90591in" svg:width="2.56811in" svg:height="0.42756in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draw:frame draw:id="id163" presentation:style-name="a987" draw:name="Título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4" text:class-names="">Clique para editar o título mestre</text:span><text:span text:style-name="a985" text:class-names=""/></text:p>
        </draw:text-box>
        <svg:title/>
        <svg:desc/>
      </draw:frame>
      <draw:frame draw:id="id164" presentation:style-name="a1003" draw:name="Espaço Reservado para Conteúdo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Editar estilos de texto Mestre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gundo ní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999" text:class-names="">Quinto nível</text:span><text:span text:style-name="a10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007" draw:name="Espaço Reservado para Texto 3" svg:x="0.75868in" svg:y="1.86111in" svg:width="3.55556in" svg:height="3.44618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Editar estilos de texto Mestre</text:span></text:p>
            </text:list-item>
          </text:list>
        </draw:text-box>
        <svg:title/>
        <svg:desc/>
      </draw:frame>
      <draw:frame draw:id="id166" presentation:style-name="a1010" draw:name="Espaço Reservado para Data 4" svg:x="1.10236in" svg:y="5.9063in" svg:width="2.45in" svg:height="0.42717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7" presentation:style-name="a1011" draw:name="Espaço Reservado para Imagem de Slide 1">
          <svg:title/>
          <svg:desc/>
        </draw:page-thumbnail>
        <draw:frame draw:id="id8" presentation:style-name="a1014" draw:name="Espaço Reservado para Anotações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9" presentation:style-name="a1017" draw:name="Espaço Reservado para Cabeçalho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0" presentation:style-name="a1020" draw:name="Espaço Reservado para Data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Espaço Reservado para Rodapé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Espaço Reservado para Número de Slide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1028">
      <draw:frame draw:id="id167" draw:layer="Master2-bg" draw:style-name="a1029" draw:name="Imagem 5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68" draw:layer="Master2-bg" draw:style-name="a1030" draw:name="Imagem 6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69" draw:layer="Master2-bg" draw:style-name="a1033" draw:name="CaixaDeTexto 7" svg:x="1.89016in" svg:y="5.90591in" svg:width="2.56811in" svg:height="0.42756in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70" draw:layer="Master2-bg" draw:style-name="a1036" draw:name="CaixaDeTexto 8" svg:x="4.61654in" svg:y="5.90591in" svg:width="3.49409in" svg:height="0.42756in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71" draw:layer="Master2-bg" draw:style-name="a1039" draw:name="CaixaDeTexto 9" svg:x="8.37677in" svg:y="5.90591in" svg:width="2.56811in" svg:height="0.42756in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draw:frame draw:id="id172" presentation:style-name="a1043" draw:name="Título 1" svg:x="0.75868in" svg:y="0.41319in" svg:width="3.55556in" svg:height="1.44792in" presentation:class="title" presentation:placeholder="false">
        <draw:text-box>
          <text:p text:style-name="a1042" text:class-names="" text:cond-style-name=""><text:span text:style-name="a1040" text:class-names="">Clique para editar o título mestre</text:span><text:span text:style-name="a1041" text:class-names=""/></text:p>
        </draw:text-box>
        <svg:title/>
        <svg:desc/>
      </draw:frame>
      <draw:frame draw:id="id173" presentation:style-name="a1046" draw:name="Espaço Reservado para Imagem 2" svg:x="4.6875in" svg:y="0.89236in" svg:width="5.57986in" svg:height="4.40799in" presentation:class="graphic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74" presentation:style-name="a1050" draw:name="Espaço Reservado para Texto 3" svg:x="0.75868in" svg:y="1.86111in" svg:width="3.55556in" svg:height="3.44618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Editar estilos de texto Mestre</text:span></text:p>
            </text:list-item>
          </text:list>
        </draw:text-box>
        <svg:title/>
        <svg:desc/>
      </draw:frame>
      <draw:frame draw:id="id175" presentation:style-name="a1053" draw:name="Espaço Reservado para Data 4" svg:x="1.10236in" svg:y="5.9063in" svg:width="2.45in" svg:height="0.42717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presentation:notes style:page-layout-name="pageLayout2" draw:style-name="a1070">
        <draw:page-thumbnail svg:x="0.23622in" svg:y="0.88858in" svg:width="7.79449in" svg:height="4.38425in" presentation:class="page" draw:id="id7" presentation:style-name="a1054" draw:name="Espaço Reservado para Imagem de Slide 1">
          <svg:title/>
          <svg:desc/>
        </draw:page-thumbnail>
        <draw:frame draw:id="id8" presentation:style-name="a1057" draw:name="Espaço Reservado para Anotações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9" presentation:style-name="a1060" draw:name="Espaço Reservado para Cabeçalho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0" presentation:style-name="a1063" draw:name="Espaço Reservado para Data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1" presentation:style-name="a1066" draw:name="Espaço Reservado para Rodapé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2" presentation:style-name="a1069" draw:name="Espaço Reservado para Número de Slide 6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71">
      <draw:frame draw:id="id176" draw:layer="Master2-bg" draw:style-name="a1072" draw:name="Imagem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77" draw:layer="Master2-bg" draw:style-name="a1073" draw:name="Imagem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78" draw:layer="Master2-bg" draw:style-name="a1076" draw:name="CaixaDeTexto 6" svg:x="1.89016in" svg:y="5.90591in" svg:width="2.56811in" svg:height="0.42756in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79" draw:layer="Master2-bg" draw:style-name="a1079" draw:name="CaixaDeTexto 7" svg:x="4.61654in" svg:y="5.90591in" svg:width="3.49409in" svg:height="0.42756in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80" draw:layer="Master2-bg" draw:style-name="a1082" draw:name="CaixaDeTexto 8" svg:x="8.37677in" svg:y="5.90591in" svg:width="2.56811in" svg:height="0.42756in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81" presentation:style-name="a1086" draw:name="Título 1" svg:x="0.55118in" svg:y="0.6185in" svg:width="9.92087in" svg:height="1.03504in" presentation:class="title" presentation:placeholder="false">
        <draw:text-box>
          <text:p text:style-name="a1085" text:class-names="" text:cond-style-name=""><text:span text:style-name="a1083" text:class-names="">Clique para editar o título mestre</text:span><text:span text:style-name="a1084" text:class-names=""/></text:p>
        </draw:text-box>
        <svg:title/>
        <svg:desc/>
      </draw:frame>
      <draw:frame draw:id="id182" presentation:style-name="a1103" draw:name="Espaço Reservado para Texto Vertical 2" svg:x="0.55118in" svg:y="1.81102in" svg:width="9.92087in" svg:height="3.23583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Editar estilos de texto Mestre</text:span></text:p>
            </text:list-item>
          </text:list>
          <text:list text:style-name="a1092">
            <text:list-item>
              <text:list text:style-name="a1092">
                <text:list-item>
                  <text:p text:style-name="a1091" text:class-names="" text:cond-style-name=""><text:span text:style-name="a1090" text:class-names="">Segundo nível</text:span></text:p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p text:style-name="a1097" text:class-names="" text:cond-style-name=""><text:span text:style-name="a10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list text:style-name="a1102">
                            <text:list-item>
                              <text:p text:style-name="a1101" text:class-names="" text:cond-style-name=""><text:span text:style-name="a1099" text:class-names="">Quinto nível</text:span><text:span text:style-name="a1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06" draw:name="Espaço Reservado para Data 3" svg:x="1.10236in" svg:y="5.9063in" svg:width="2.45in" svg:height="0.42717in" presentation:class="date-time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presentation:notes style:page-layout-name="pageLayout2" draw:style-name="a1123">
        <draw:page-thumbnail svg:x="0.23622in" svg:y="0.88858in" svg:width="7.79449in" svg:height="4.38425in" presentation:class="page" draw:id="id7" presentation:style-name="a1107" draw:name="Espaço Reservado para Imagem de Slide 1">
          <svg:title/>
          <svg:desc/>
        </draw:page-thumbnail>
        <draw:frame draw:id="id8" presentation:style-name="a1110" draw:name="Espaço Reservado para Anotações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9" presentation:style-name="a1113" draw:name="Espaço Reservado para Cabeçalho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0" presentation:style-name="a1116" draw:name="Espaço Reservado para Data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1" presentation:style-name="a1119" draw:name="Espaço Reservado para Rodapé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2" presentation:style-name="a1122" draw:name="Espaço Reservado para Número de Slide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exto-e-Título-Vertical" style:page-layout-name="pageLayout1" draw:style-name="a1124">
      <draw:frame draw:id="id184" draw:layer="Master2-bg" draw:style-name="a1125" draw:name="Imagem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85" draw:layer="Master2-bg" draw:style-name="a1126" draw:name="Imagem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86" draw:layer="Master2-bg" draw:style-name="a1129" draw:name="CaixaDeTexto 6" svg:x="1.89016in" svg:y="5.90591in" svg:width="2.56811in" svg:height="0.42756in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87" draw:layer="Master2-bg" draw:style-name="a1132" draw:name="CaixaDeTexto 7" svg:x="4.61654in" svg:y="5.90591in" svg:width="3.49409in" svg:height="0.42756in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88" draw:layer="Master2-bg" draw:style-name="a1135" draw:name="CaixaDeTexto 8" svg:x="8.37677in" svg:y="5.90591in" svg:width="2.56811in" svg:height="0.42756in">
        <draw:text-box>
          <text:p text:style-name="a1134" text:class-names="" text:cond-style-name=""><text:span text:style-name="a1133" text:class-names=""><text:page-number style:num-format="1" text:fixed="false"/></text:span></text:p>
        </draw:text-box>
        <svg:title/>
        <svg:desc/>
      </draw:frame>
      <draw:frame draw:id="id189" presentation:style-name="a1139" draw:name="Título Vertical 1" svg:x="7.99306in" svg:y="0.61806in" svg:width="2.47917in" svg:height="4.42882in" presentation:class="title" presentation:placeholder="false">
        <draw:text-box>
          <text:p text:style-name="a1138" text:class-names="" text:cond-style-name=""><text:span text:style-name="a1136" text:class-names="">Clique para editar o título mestre</text:span><text:span text:style-name="a1137" text:class-names=""/></text:p>
        </draw:text-box>
        <svg:title/>
        <svg:desc/>
      </draw:frame>
      <draw:frame draw:id="id190" presentation:style-name="a1156" draw:name="Espaço Reservado para Texto Vertical 2" svg:x="0.55035in" svg:y="0.61806in" svg:width="7.27604in" svg:height="4.42882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Editar estilos de texto Mestre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gundo ní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list text:style-name="a1155">
                            <text:list-item>
                              <text:p text:style-name="a1154" text:class-names="" text:cond-style-name=""><text:span text:style-name="a1152" text:class-names="">Quinto nível</text:span><text:span text:style-name="a1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59" draw:name="Espaço Reservado para Data 3" svg:x="1.10236in" svg:y="5.9063in" svg:width="2.45in" svg:height="0.42717in" presentation:class="date-tim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presentation:notes style:page-layout-name="pageLayout2" draw:style-name="a1176">
        <draw:page-thumbnail svg:x="0.23622in" svg:y="0.88858in" svg:width="7.79449in" svg:height="4.38425in" presentation:class="page" draw:id="id7" presentation:style-name="a1160" draw:name="Espaço Reservado para Imagem de Slide 1">
          <svg:title/>
          <svg:desc/>
        </draw:page-thumbnail>
        <draw:frame draw:id="id8" presentation:style-name="a1163" draw:name="Espaço Reservado para Anotações 2" svg:x="0.82677in" svg:y="5.55394in" svg:width="6.61378in" svg:height="5.26142in" presentation:class="notes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9" presentation:style-name="a1166" draw:name="Espaço Reservado para Cabeçalho 3" svg:x="0in" svg:y="0in" svg:width="3.5878in" svg:height="0.58425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69" draw:name="Espaço Reservado para Data 4" svg:x="4.67953in" svg:y="0in" svg:width="3.5878in" svg:height="0.58425in" presentation:class="date-time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1" presentation:style-name="a1172" draw:name="Espaço Reservado para Rodapé 5" svg:x="0in" svg:y="11.10827in" svg:width="3.5878in" svg:height="0.58425in" presentation:class="footer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2" presentation:style-name="a1175" draw:name="Espaço Reservado para Número de Slide 6" svg:x="4.67953in" svg:y="11.10827in" svg:width="3.5878in" svg:height="0.58425in" presentation:class="page-number" presentation:placeholder="false">
          <draw:text-box>
            <text:p text:style-name="a1174" text:class-names="" text:cond-style-name=""><text:span text:style-name="a11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7">
      <draw:frame draw:id="id192" presentation:style-name="a1180" draw:name="Espaço Reservado para Cabeçalho 1" svg:x="0in" svg:y="0in" svg:width="3.5878in" svg:height="0.58425in" presentation:class="head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193" presentation:style-name="a1183" draw:name="Espaço Reservado para Data 2" svg:x="4.67953in" svg:y="0in" svg:width="3.5878in" svg:height="0.58425in" presentation:class="date-time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94" presentation:style-name="a1186" draw:name="Espaço Reservado para Rodapé 3" svg:x="0in" svg:y="11.10827in" svg:width="3.5878in" svg:height="0.58425in" presentation:class="foot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195" presentation:style-name="a1189" draw:name="Espaço Reservado para Número de Slide 4" svg:x="4.67953in" svg:y="11.10827in" svg:width="3.5878in" svg:height="0.58425in" presentation:class="page-number" presentation:placeholder="false">
        <draw:text-box>
          <text:p text:style-name="a1188" text:class-names="" text:cond-style-name=""><text:span text:style-name="a118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assy Red</dc:title>
    <dc:creator>aluno</dc:creator>
    <meta:creation-date>2019-04-24T23:11:22Z</meta:creation-date>
    <dc:date>2019-04-25T13:01:15Z</dc:date>
    <meta:editing-cycles>3</meta:editing-cycles>
    <meta:editing-duration>PT641S</meta:editing-duration>
    <meta:document-statistic meta:paragraph-count="93" meta:word-count="349"/>
  </office:meta>
</office:document-meta>
</file>