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text:style-name="WW_CharLFO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text-properties fo:font-size="10pt" style:font-size-asian="10pt" style:font-size-complex="10pt"/>
    </style:style>
    <style:style style:name="P9" style:parent-style-name="Normal" style:family="paragraph">
      <style:paragraph-properties fo:margin-left="0.768in" fo:text-indent="-0.768in">
        <style:tab-stops/>
      </style:paragraph-properties>
    </style:style>
    <style:style style:name="T1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1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2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3" style:parent-style-name="Fonteparág.padrão" style:family="text">
      <style:text-properties style:font-name="Courier New" style:font-name-complex="Courier New" fo:color="#FF0000" fo:font-size="10pt" style:font-size-asian="10pt" style:font-size-complex="10pt"/>
    </style:style>
    <style:style style:name="T14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5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16" style:parent-style-name="Fonteparág.padrão" style:family="text">
      <style:text-properties fo:font-size="10pt" style:font-size-asian="10pt" style:font-size-complex="10pt"/>
    </style:style>
    <style:style style:name="P17" style:parent-style-name="Normal" style:family="paragraph">
      <style:paragraph-properties fo:margin-left="0.768in" fo:text-indent="-0.768in">
        <style:tab-stops/>
      </style:paragraph-properties>
    </style:style>
    <style:style style:name="T18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9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2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T22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23" style:parent-style-name="Fonteparág.padrão" style:family="text">
      <style:text-properties fo:font-size="10pt" style:font-size-asian="10pt" style:font-size-complex="10pt"/>
    </style:style>
    <style:style style:name="T24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25" style:parent-style-name="Fonteparág.padrão" style:family="text">
      <style:text-properties fo:font-size="10pt" style:font-size-asian="10pt" style:font-size-complex="10pt"/>
    </style:style>
    <style:style style:name="P26" style:parent-style-name="Normal" style:family="paragraph">
      <style:paragraph-properties fo:margin-left="0.768in" fo:text-indent="-0.768in">
        <style:tab-stops/>
      </style:paragraph-properties>
      <style:text-properties fo:font-size="10pt" style:font-size-asian="10pt" style:font-size-complex="10pt"/>
    </style:style>
    <style:style style:name="P27" style:parent-style-name="Normal" style:family="paragraph">
      <style:paragraph-properties fo:margin-left="0.768in" fo:text-indent="-0.768in">
        <style:tab-stops/>
      </style:paragraph-properties>
    </style:style>
    <style:style style:name="T28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29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3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31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33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34" style:parent-style-name="Fonteparág.padrão" style:family="text">
      <style:text-properties fo:font-size="10pt" style:font-size-asian="10pt" style:font-size-complex="10pt"/>
    </style:style>
    <style:style style:name="P35" style:parent-style-name="Normal" style:family="paragraph">
      <style:paragraph-properties fo:margin-left="0.768in" fo:text-indent="-0.768in">
        <style:tab-stops/>
      </style:paragraph-properties>
    </style:style>
    <style:style style:name="T36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37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38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39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40" style:parent-style-name="Fonteparág.padrão" style:family="text">
      <style:text-properties fo:font-size="10pt" style:font-size-asian="10pt" style:font-size-complex="10pt"/>
    </style:style>
    <style:style style:name="T41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42" style:parent-style-name="Normal" style:family="paragraph">
      <style:paragraph-properties fo:margin-left="0.768in" fo:text-indent="-0.768in">
        <style:tab-stops/>
      </style:paragraph-properties>
    </style:style>
    <style:style style:name="T43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44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45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46" style:parent-style-name="Fonteparág.padrão" style:family="text">
      <style:text-properties fo:font-size="10pt" style:font-size-asian="10pt" style:font-size-complex="10pt"/>
    </style:style>
    <style:style style:name="T47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48" style:parent-style-name="Fonteparág.padrão" style:family="text">
      <style:text-properties fo:font-size="10pt" style:font-size-asian="10pt" style:font-size-complex="10pt"/>
    </style:style>
    <style:style style:name="P49" style:parent-style-name="Normal" style:family="paragraph">
      <style:paragraph-properties fo:margin-left="0.768in" fo:text-indent="-0.768in">
        <style:tab-stops/>
      </style:paragraph-properties>
    </style:style>
    <style:style style:name="T5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51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52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53" style:parent-style-name="Fonteparág.padrão" style:family="text">
      <style:text-properties fo:font-size="10pt" style:font-size-asian="10pt" style:font-size-complex="10pt"/>
    </style:style>
    <style:style style:name="T54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55" style:parent-style-name="Fonteparág.padrão" style:family="text">
      <style:text-properties fo:font-size="10pt" style:font-size-asian="10pt" style:font-size-complex="10pt"/>
    </style:style>
    <style:style style:name="P56" style:parent-style-name="Normal" style:family="paragraph">
      <style:paragraph-properties fo:margin-left="0.768in" fo:text-indent="-0.768in">
        <style:tab-stops/>
      </style:paragraph-properties>
    </style:style>
    <style:style style:name="T57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58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59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60" style:parent-style-name="Fonteparág.padrão" style:family="text">
      <style:text-properties fo:font-size="10pt" style:font-size-asian="10pt" style:font-size-complex="10pt"/>
    </style:style>
    <style:style style:name="T61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62" style:parent-style-name="Fonteparág.padrão" style:family="text">
      <style:text-properties fo:font-size="10pt" style:font-size-asian="10pt" style:font-size-complex="10pt"/>
    </style:style>
    <style:style style:name="P63" style:parent-style-name="Normal" style:family="paragraph">
      <style:paragraph-properties fo:margin-left="0.768in" fo:text-indent="-0.768in">
        <style:tab-stops/>
      </style:paragraph-properties>
    </style:style>
    <style:style style:name="T64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65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66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67" style:parent-style-name="Fonteparág.padrão" style:family="text">
      <style:text-properties fo:font-size="10pt" style:font-size-asian="10pt" style:font-size-complex="10pt"/>
    </style:style>
    <style:style style:name="T68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69" style:parent-style-name="Fonteparág.padrão" style:family="text">
      <style:text-properties fo:font-size="10pt" style:font-size-asian="10pt" style:font-size-complex="10pt"/>
    </style:style>
    <style:style style:name="P70" style:parent-style-name="Normal" style:family="paragraph">
      <style:paragraph-properties fo:margin-left="0.768in" fo:text-indent="-0.768in">
        <style:tab-stops/>
      </style:paragraph-properties>
    </style:style>
    <style:style style:name="T71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72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73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74" style:parent-style-name="Fonteparág.padrão" style:family="text">
      <style:text-properties fo:font-size="10pt" style:font-size-asian="10pt" style:font-size-complex="10pt"/>
    </style:style>
    <style:style style:name="T75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76" style:parent-style-name="Fonteparág.padrão" style:family="text">
      <style:text-properties fo:font-size="10pt" style:font-size-asian="10pt" style:font-size-complex="10pt"/>
    </style:style>
    <style:style style:name="P77" style:parent-style-name="Normal" style:family="paragraph">
      <style:paragraph-properties fo:margin-left="0.768in" fo:text-indent="-0.768in">
        <style:tab-stops/>
      </style:paragraph-properties>
    </style:style>
    <style:style style:name="T78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79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8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81" style:parent-style-name="Fonteparág.padrão" style:family="text">
      <style:text-properties fo:font-size="10pt" style:font-size-asian="10pt" style:font-size-complex="10pt"/>
    </style:style>
    <style:style style:name="T82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83" style:parent-style-name="Fonteparág.padrão" style:family="text">
      <style:text-properties fo:font-size="10pt" style:font-size-asian="10pt" style:font-size-complex="10pt"/>
    </style:style>
    <style:style style:name="T84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85" style:parent-style-name="Fonteparág.padrão" style:family="text">
      <style:text-properties fo:font-size="10pt" style:font-size-asian="10pt" style:font-size-complex="10pt"/>
    </style:style>
    <style:style style:name="P86" style:parent-style-name="Normal" style:family="paragraph">
      <style:paragraph-properties fo:margin-left="0.768in" fo:text-indent="-0.768in">
        <style:tab-stops/>
      </style:paragraph-properties>
    </style:style>
    <style:style style:name="T87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88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89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90" style:parent-style-name="Fonteparág.padrão" style:family="text">
      <style:text-properties fo:font-size="10pt" style:font-size-asian="10pt" style:font-size-complex="10pt"/>
    </style:style>
    <style:style style:name="T91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92" style:parent-style-name="Fonteparág.padrão" style:family="text">
      <style:text-properties fo:font-size="10pt" style:font-size-asian="10pt" style:font-size-complex="10pt"/>
    </style:style>
    <style:style style:name="T93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94" style:parent-style-name="Fonteparág.padrão" style:family="text">
      <style:text-properties fo:font-size="10pt" style:font-size-asian="10pt" style:font-size-complex="10pt"/>
    </style:style>
    <style:style style:name="T95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96" style:parent-style-name="Fonteparág.padrão" style:family="text">
      <style:text-properties fo:font-size="10pt" style:font-size-asian="10pt" style:font-size-complex="10pt"/>
    </style:style>
    <style:style style:name="P97" style:parent-style-name="Normal" style:family="paragraph">
      <style:paragraph-properties fo:margin-left="0.768in" fo:text-indent="-0.768in">
        <style:tab-stops/>
      </style:paragraph-properties>
    </style:style>
    <style:style style:name="T98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99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0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01" style:parent-style-name="Fonteparág.padrão" style:family="text">
      <style:text-properties fo:font-size="10pt" style:font-size-asian="10pt" style:font-size-complex="10pt"/>
    </style:style>
    <style:style style:name="T102" style:parent-style-name="Fonteparág.padrão" style:family="text">
      <style:text-properties fo:font-size="10pt" style:font-size-asian="10pt" style:font-size-complex="10pt"/>
    </style:style>
    <style:style style:name="T103" style:parent-style-name="Fonteparág.padrão" style:family="text">
      <style:text-properties fo:font-size="10pt" style:font-size-asian="10pt" style:font-size-complex="10pt"/>
    </style:style>
    <style:style style:name="P104" style:parent-style-name="Normal" style:family="paragraph">
      <style:paragraph-properties fo:margin-left="0.768in" fo:text-indent="-0.768in">
        <style:tab-stops/>
      </style:paragraph-properties>
      <style:text-properties fo:font-size="10pt" style:font-size-asian="10pt" style:font-size-complex="10pt"/>
    </style:style>
    <style:style style:name="P105" style:parent-style-name="Normal" style:family="paragraph">
      <style:paragraph-properties fo:margin-left="0.768in" fo:text-indent="-0.768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6" style:parent-style-name="Normal" style:family="paragraph">
      <style:paragraph-properties fo:margin-left="0.768in" fo:text-indent="-0.768in">
        <style:tab-stops/>
      </style:paragraph-properties>
      <style:text-properties fo:font-size="10pt" style:font-size-asian="10pt" style:font-size-complex="10pt"/>
    </style:style>
    <style:style style:name="P107" style:parent-style-name="Normal" style:family="paragraph">
      <style:paragraph-properties fo:margin-left="0.768in" fo:text-indent="-0.768in">
        <style:tab-stops/>
      </style:paragraph-properties>
    </style:style>
    <style:style style:name="T108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9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0" style:parent-style-name="Fonteparág.padrão" style:family="text">
      <style:text-properties style:font-name="Courier New" style:font-name-complex="Courier New" fo:color="#FF0000" fo:font-size="10pt" style:font-size-asian="10pt" style:font-size-complex="10pt" fo:language="en" fo:country="US"/>
    </style:style>
    <style:style style:name="T111" style:parent-style-name="Fonteparág.padrão" style:family="text">
      <style:text-properties style:font-name="Courier New" style:font-name-complex="Courier New" fo:color="#FF0000" fo:font-size="10pt" style:font-size-asian="10pt" style:font-size-complex="10pt" fo:language="en" fo:country="US"/>
    </style:style>
    <style:style style:name="P112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13" style:parent-style-name="Normal" style:family="paragraph">
      <style:paragraph-properties fo:margin-left="0.768in" fo:text-indent="-0.768in">
        <style:tab-stops/>
      </style:paragraph-properties>
    </style:style>
    <style:style style:name="T114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5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P116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17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18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19" style:parent-style-name="Normal" style:family="paragraph">
      <style:paragraph-properties fo:margin-left="0.768in" fo:text-indent="-0.768in">
        <style:tab-stops/>
      </style:paragraph-properties>
    </style:style>
    <style:style style:name="T120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21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2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3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4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5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6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7" style:parent-style-name="Normal" style:family="paragraph">
      <style:paragraph-properties fo:margin-left="0.768in" fo:text-indent="-0.768in">
        <style:tab-stops/>
      </style:paragraph-properties>
    </style:style>
    <style:style style:name="T128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9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P130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31" style:parent-style-name="Normal" style:family="paragraph">
      <style:paragraph-properties fo:margin-left="0.768in" fo:text-indent="-0.768in">
        <style:tab-stops/>
      </style:paragraph-properties>
    </style:style>
    <style:style style:name="T132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33" style:parent-style-name="Fonteparág.padrão" style:family="text">
      <style:text-properties style:font-name="Courier New" style:font-name-complex="Courier New" fo:color="#FF0000" fo:font-size="10pt" style:font-size-asian="10pt" style:font-size-complex="10pt"/>
    </style:style>
    <style:style style:name="T134" style:parent-style-name="Fonteparág.padrão" style:family="text">
      <style:text-properties style:font-name="Courier New" style:font-name-complex="Courier New" fo:color="#FF0000" fo:font-size="10pt" style:font-size-asian="10pt" style:font-size-complex="10pt"/>
    </style:style>
    <style:style style:name="P135" style:parent-style-name="Normal" style:family="paragraph">
      <style:paragraph-properties fo:margin-left="0.768in" fo:text-indent="-0.768in">
        <style:tab-stops/>
      </style:paragraph-properties>
    </style:style>
    <style:style style:name="T136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37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8" style:parent-style-name="Fonteparág.padrão" style:family="text">
      <style:text-properties style:font-name="Courier New" style:font-name-complex="Courier New" fo:color="#FF0000" fo:font-size="10pt" style:font-size-asian="10pt" style:font-size-complex="10pt" fo:language="en" fo:country="US"/>
    </style:style>
    <style:style style:name="P139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40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41" style:parent-style-name="Normal" style:family="paragraph">
      <style:paragraph-properties fo:margin-left="0.768in" fo:text-indent="-0.768in">
        <style:tab-stops/>
      </style:paragraph-properties>
    </style:style>
    <style:style style:name="T142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3" style:parent-style-name="Fonteparág.padrão" style:family="text">
      <style:text-properties style:font-name="Courier New" style:font-name-complex="Courier New" fo:color="#FF0000" fo:font-size="10pt" style:font-size-asian="10pt" style:font-size-complex="10pt" fo:language="en" fo:country="US"/>
    </style:style>
    <style:style style:name="P144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45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46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47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48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49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50" style:parent-style-name="Normal" style:family="paragraph">
      <style:paragraph-properties fo:margin-left="0.768in" fo:text-indent="-0.768in">
        <style:tab-stops/>
      </style:paragraph-properties>
    </style:style>
    <style:style style:name="T151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Fonteparág.padrão" style:family="text">
      <style:text-properties style:font-name="Courier New" style:font-name-complex="Courier New" fo:color="#FF0000" fo:font-size="10pt" style:font-size-asian="10pt" style:font-size-complex="10pt" fo:language="en" fo:country="US"/>
    </style:style>
    <style:style style:name="T153" style:parent-style-name="Fonteparág.padrão" style:family="text">
      <style:text-properties style:font-name="Courier New" style:font-name-complex="Courier New" fo:color="#FF0000" fo:font-size="10pt" style:font-size-asian="10pt" style:font-size-complex="10pt" fo:language="en" fo:country="US"/>
    </style:style>
    <style:style style:name="P154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55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56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57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58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59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0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1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2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3" style:parent-style-name="Normal" style:family="paragraph">
      <style:paragraph-properties fo:margin-left="0.768in" fo:text-indent="-0.768in">
        <style:tab-stops/>
      </style:paragraph-properties>
    </style:style>
    <style:style style:name="T164" style:parent-style-name="Fonteparág.padrão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5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P166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67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68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69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0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1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2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3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4" style:parent-style-name="Normal" style:family="paragraph">
      <style:paragraph-properties fo:margin-left="0.768in" fo:text-indent="-0.768in">
        <style:tab-stops/>
      </style:paragraph-properties>
    </style:style>
    <style:style style:name="T175" style:parent-style-name="Fonteparág.padrão" style:family="text">
      <style:text-properties style:font-name="Courier New" style:font-name-complex="Courier New" fo:font-size="10pt" style:font-size-asian="10pt" style:font-size-complex="10pt"/>
    </style:style>
    <style:style style:name="T176" style:parent-style-name="Fonteparág.padrão" style:family="text">
      <style:text-properties style:font-name="Courier New" style:font-name-complex="Courier New" fo:color="#FF0000" fo:font-size="10pt" style:font-size-asian="10pt" style:font-size-complex="10pt"/>
    </style:style>
    <style:style style:name="P177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8" style:parent-style-name="Normal" style:family="paragraph">
      <style:paragraph-properties fo:margin-left="0.768in" fo:text-indent="-0.768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9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180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18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182" style:parent-style-name="Corpodetexto2" style:family="paragraph">
      <style:paragraph-properties fo:margin-left="0.1375in" fo:text-indent="-0.1375in">
        <style:tab-stops/>
      </style:paragraph-properties>
    </style:style>
    <style:style style:name="P183" style:parent-style-name="Normal" style:family="paragraph">
      <style:paragraph-properties fo:text-align="justify" fo:margin-left="0.1375in" fo:text-indent="-0.1375in">
        <style:tab-stops/>
      </style:paragraph-properties>
      <style:text-properties fo:font-size="10pt" style:font-size-asian="10pt" style:font-size-complex="10pt"/>
    </style:style>
    <style:style style:name="P18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8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19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0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1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2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3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3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3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3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3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3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3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37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38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39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40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41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42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43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44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45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46" style:parent-style-name="Normal" style:family="paragraph">
      <style:paragraph-properties fo:text-align="justify" fo:margin-left="0.275in" fo:text-indent="-0.1375in">
        <style:tab-stops/>
      </style:paragraph-properties>
      <style:text-properties fo:font-size="10pt" style:font-size-asian="10pt" style:font-size-complex="10pt"/>
    </style:style>
    <style:style style:name="P247" style:parent-style-name="Normal" style:family="paragraph">
      <style:paragraph-properties>
        <style:tab-stops>
          <style:tab-stop style:type="left" style:position="0.7875in"/>
        </style:tab-stops>
      </style:paragraph-properties>
      <style:text-properties fo:font-size="10pt" style:font-size-asian="10pt" style:font-size-complex="10pt"/>
    </style:style>
    <style:style style:name="P248" style:parent-style-name="Normal" style:family="paragraph">
      <style:paragraph-properties>
        <style:tab-stops>
          <style:tab-stop style:type="left" style:position="0.7875in"/>
        </style:tab-stops>
      </style:paragraph-properties>
      <style:text-properties fo:font-size="10pt" style:font-size-asian="10pt" style:font-size-complex="10pt"/>
    </style:style>
    <style:style style:name="P249" style:parent-style-name="Normal" style:family="paragraph">
      <style:paragraph-properties fo:margin-left="0.1576in">
        <style:tab-stops>
          <style:tab-stop style:type="left" style:position="0.6298in"/>
        </style:tab-stops>
      </style:paragraph-properties>
      <style:text-properties fo:font-size="10pt" style:font-size-asian="10pt" style:font-size-complex="10pt"/>
    </style:style>
    <style:style style:name="P250" style:parent-style-name="Normal" style:family="paragraph">
      <style:paragraph-properties fo:margin-left="0.1576in">
        <style:tab-stops>
          <style:tab-stop style:type="left" style:position="0.6298in"/>
        </style:tab-stops>
      </style:paragraph-properties>
      <style:text-properties fo:font-size="10pt" style:font-size-asian="10pt" style:font-size-complex="10pt"/>
    </style:style>
    <style:style style:name="P251" style:parent-style-name="Normal" style:family="paragraph">
      <style:paragraph-properties fo:margin-left="0.2361in" fo:text-indent="-0.0784in">
        <style:tab-stops>
          <style:tab-stop style:type="left" style:position="0.5513in"/>
        </style:tab-stops>
      </style:paragraph-properties>
      <style:text-properties fo:font-size="10pt" style:font-size-asian="10pt" style:font-size-complex="10pt"/>
    </style:style>
    <style:style style:name="P25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5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6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7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89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90" style:parent-style-name="Corpodetexto2" style:family="paragraph">
      <style:paragraph-properties fo:margin-left="0.1375in" fo:text-indent="-0.1375in">
        <style:tab-stops/>
      </style:paragraph-properties>
    </style:style>
    <style:style style:name="P29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92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29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94" style:parent-style-name="Normal" style:family="paragraph">
      <style:paragraph-properties fo:text-align="justify"/>
    </style:style>
    <style:style style:name="T295" style:parent-style-name="Fonteparág.padrão" style:family="text">
      <style:text-properties fo:font-size="10pt" style:font-size-asian="10pt" style:font-size-complex="10pt"/>
    </style:style>
    <style:style style:name="T296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29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298" style:parent-style-name="Normal" style:family="paragraph">
      <style:paragraph-properties fo:text-align="justify"/>
    </style:style>
    <style:style style:name="T299" style:parent-style-name="Fonteparág.padrão" style:family="text">
      <style:text-properties fo:font-size="10pt" style:font-size-asian="10pt" style:font-size-complex="10pt"/>
    </style:style>
    <style:style style:name="T300" style:parent-style-name="Fonteparág.padrão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301" style:parent-style-name="Fonteparág.padrão" style:family="text">
      <style:text-properties fo:font-size="10pt" style:font-size-asian="10pt" style:font-size-complex="10pt"/>
    </style:style>
    <style:style style:name="T302" style:parent-style-name="Fonteparág.padrão" style:family="text">
      <style:text-properties fo:font-size="10pt" style:font-size-asian="10pt" style:font-size-complex="10pt"/>
    </style:style>
    <style:style style:name="T303" style:parent-style-name="Fonteparág.padrão" style:family="text">
      <style:text-properties fo:font-size="10pt" style:font-size-asian="10pt" style:font-size-complex="10pt"/>
    </style:style>
    <style:style style:name="T304" style:parent-style-name="Fonteparág.padrão" style:family="text">
      <style:text-properties fo:font-size="10pt" style:font-size-asian="10pt" style:font-size-complex="10pt"/>
    </style:style>
    <style:style style:name="T305" style:parent-style-name="Fonteparág.padrão" style:family="text">
      <style:text-properties fo:font-size="10pt" style:font-size-asian="10pt" style:font-size-complex="10pt"/>
    </style:style>
    <style:style style:name="P306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T307" style:parent-style-name="Fonteparág.padrão" style:family="text">
      <style:text-properties style:font-name="Courier New" style:font-name-complex="Courier New" fo:font-weight="bold" style:font-weight-asian="bold" style:font-weight-complex="bold"/>
    </style:style>
    <style:style style:name="P308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309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31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1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1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1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1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1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16" style:parent-style-name="Normal" style:family="paragraph">
      <style:paragraph-properties fo:text-align="justify"/>
      <style:text-properties fo:font-size="10pt" style:font-size-asian="10pt" style:font-size-complex="10pt"/>
    </style:style>
  </office:automatic-styles>
  <office:body>
    <office:text text:use-soft-page-breaks="true">
      <text:p text:style-name="P1">FACULDADE DE TECNOLOGIA DE SÃO PAULO</text:p>
      <text:p text:style-name="P2">LP - Linguagem de Programação</text:p>
      <text:p text:style-name="P3"/>
      <text:p text:style-name="P4">LISTA DE EXERCÍCIOS PREPARATÓRIOS</text:p>
      <text:p text:style-name="P5"/>
      <text:p text:style-name="P6"/>
      <text:p text:style-name="P7">I - Assinale V ou F:</text:p>
      <text:p text:style-name="P8"/>
      <text:p text:style-name="P9"><text:span text:style-name="T10">a)</text:span><text:span text:style-name="T11"><text:s/></text:span><text:span text:style-name="T12">(</text:span><text:span text:style-name="T13">F</text:span><text:span text:style-name="T14">) </text:span><text:span text:style-name="T15">MAIN</text:span><text:span text:style-name="T16"><text:s/>é uma palavra chave da Linguagem C.</text:span></text:p>
      <text:p text:style-name="P17"><text:span text:style-name="T18">b) (</text:span><text:span text:style-name="T19">V</text:span><text:span text:style-name="T20">) </text:span><text:span text:style-name="T21">Podemos guardar em um<text:s/></text:span><text:span text:style-name="T22">long int</text:span><text:span text:style-name="T23"><text:s/>valores até 2 vezes maior que num<text:s/></text:span><text:span text:style-name="T24">int</text:span><text:span text:style-name="T25">, não mais do que isso.</text:span></text:p>
      <text:p text:style-name="P26"/>
      <text:p text:style-name="P27"><text:span text:style-name="T28">c) (</text:span><text:span text:style-name="T29">F</text:span><text:span text:style-name="T30">) </text:span><text:span text:style-name="T31">’\t’</text:span><text:span text:style-name="T32"><text:s/>representa uma tabulação,<text:s/></text:span><text:span text:style-name="T33">‘\2t’</text:span><text:span text:style-name="T34"><text:s/>representa duas tabulações.</text:span></text:p>
      <text:p text:style-name="P35"><text:span text:style-name="T36">d) (</text:span><text:span text:style-name="T37">F</text:span><text:span text:style-name="T38">) </text:span><text:span text:style-name="T39">x+=2*t+y;</text:span><text:span text:style-name="T40"><text:s/>é equivalente a<text:s/></text:span><text:span text:style-name="T41">x=x+2*t+y;</text:span></text:p>
      <text:p text:style-name="P42"><text:span text:style-name="T43">e) (</text:span><text:span text:style-name="T44">V</text:span><text:span text:style-name="T45">) </text:span><text:span text:style-name="T46">O formato<text:s/></text:span><text:span text:style-name="T47">%c</text:span><text:span text:style-name="T48"><text:s/>imprime caracteres ASCII.</text:span></text:p>
      <text:p text:style-name="P49"><text:span text:style-name="T50">f) (</text:span><text:span text:style-name="T51">F</text:span><text:span text:style-name="T52">) </text:span><text:span text:style-name="T53">O formato<text:s/></text:span><text:span text:style-name="T54">%C</text:span><text:span text:style-name="T55"><text:s/>imprime caracteres ASCII em maiúsculo.</text:span></text:p>
      <text:p text:style-name="P56"><text:span text:style-name="T57">g) (</text:span><text:span text:style-name="T58">V</text:span><text:span text:style-name="T59">) </text:span><text:span text:style-name="T60">O formato<text:s/></text:span><text:span text:style-name="T61">%b</text:span><text:span text:style-name="T62"><text:s/>imprime números em binário.</text:span></text:p>
      <text:p text:style-name="P63"><text:span text:style-name="T64">h) (</text:span><text:span text:style-name="T65">V</text:span><text:span text:style-name="T66">) </text:span><text:span text:style-name="T67">O formato<text:s/></text:span><text:span text:style-name="T68">%x</text:span><text:span text:style-name="T69"><text:s/>imprime números em hexadecimal.</text:span></text:p>
      <text:p text:style-name="P70"><text:span text:style-name="T71">i) (</text:span><text:span text:style-name="T72">V</text:span><text:span text:style-name="T73">) </text:span><text:span text:style-name="T74">O formato<text:s/></text:span><text:span text:style-name="T75">%X</text:span><text:span text:style-name="T76"><text:s/>imprime números em hexadecimal, dígitos alfabéticos em maiúsculo.</text:span></text:p>
      <text:p text:style-name="P77"><text:span text:style-name="T78">j) (</text:span><text:span text:style-name="T79">F</text:span><text:span text:style-name="T80">) </text:span><text:span text:style-name="T81">Seja a declaração:<text:s/></text:span><text:span text:style-name="T82">int i=0x0F0F;</text:span><text:span text:style-name="T83"><text:s/>assim, a expressão<text:s/></text:span><text:span text:style-name="T84">(!i==~i)</text:span><text:span text:style-name="T85"><text:s/>é verdadeira.</text:span></text:p>
      <text:p text:style-name="P86"><text:span text:style-name="T87">k) (</text:span><text:span text:style-name="T88">F</text:span><text:span text:style-name="T89">) </text:span><text:span text:style-name="T90">A diretiva<text:s/></text:span><text:span text:style-name="T91">#define prod(a,b) a*b</text:span><text:span text:style-name="T92"><text:s/>garante a precedência do operador<text:s/></text:span><text:span text:style-name="T93">*</text:span><text:span text:style-name="T94"><text:s/>sobre o operador<text:s/></text:span><text:span text:style-name="T95">+</text:span><text:span text:style-name="T96">.</text:span></text:p>
      <text:p text:style-name="P97"><text:span text:style-name="T98">l) (</text:span><text:span text:style-name="T99">V</text:span><text:span text:style-name="T100">)<text:s/></text:span><text:span text:style-name="T101">A chamada de uma função sem o protótipo presente causa erro de compilação</text:span><text:span text:style-name="T102"><text:s/>em qualquer compilador</text:span><text:span text:style-name="T103">.</text:span></text:p>
      <text:p text:style-name="P104"/>
      <text:p text:style-name="P105">II - Qual a saída dos programas a seguir?</text:p>
      <text:p text:style-name="P106"/>
      <text:p text:style-name="P107"><text:span text:style-name="T108">a) #include &lt;stdio.h&gt;</text:span><text:span text:style-name="T109"><text:s/></text:span><text:span text:style-name="T110">NADA</text:span><text:span text:style-name="T111">,NÃO ENTRA NO IF</text:span></text:p>
      <text:p text:style-name="P112"><text:s text:c="3"/>int<text:s/>main()</text:p>
      <text:p text:style-name="P113"><text:span text:style-name="T114"><text:s text:c="3"/></text:span><text:span text:style-name="T115">{</text:span></text:p>
      <text:p text:style-name="P116"><text:s text:c="6"/>int al=25;</text:p>
      <text:p text:style-name="P117"><text:s text:c="6"/>if(50&gt;=al&gt;=10)</text:p>
      <text:p text:style-name="P118"><text:s text:c="9"/>printf(“\nEstá dentro do intervalo”);</text:p>
      <text:p text:style-name="P119"><text:span text:style-name="T120"><text:s text:c="3"/></text:span><text:span text:style-name="T121">}</text:span></text:p>
      <text:p text:style-name="P122"/>
      <text:p text:style-name="P123">b)#include &lt;stdio.h&gt;</text:p>
      <text:p text:style-name="P124"><text:s text:c="2"/>#define soma(a,b) a+b</text:p>
      <text:p text:style-name="P125"><text:s text:c="2"/>#define prod(a,b) a*b</text:p>
      <text:p text:style-name="P126"><text:s text:c="2"/>void main(void)</text:p>
      <text:p text:style-name="P127"><text:span text:style-name="T128"><text:s text:c="2"/></text:span><text:span text:style-name="T129">{</text:span></text:p>
      <text:p text:style-name="P130"><text:s text:c="5"/>int i=3, j=5;</text:p>
      <text:p text:style-name="P131"><text:span text:style-name="T132"><text:s text:c="5"/>printf(“%d”, 2*soma(i,j));</text:span><text:span text:style-name="T133">2*3+5=1</text:span><text:span text:style-name="T134">1</text:span></text:p>
      <text:p text:style-name="P135"><text:span text:style-name="T136"><text:s text:c="5"/></text:span><text:span text:style-name="T137">printf(“%d”, prod(i+j,j-i));</text:span><text:span text:style-name="T138">3+5*5-3=25</text:span></text:p>
      <text:p text:style-name="P139"><text:s text:c="2"/>}</text:p>
      <text:p text:style-name="P140"/>
      <text:p text:style-name="P141"><text:span text:style-name="T142">c)#include &lt;stdio.h&gt;</text:span><text:span text:style-name="T143">NADA, TEM QUE IMPORTAR O MATH</text:span></text:p>
      <text:p text:style-name="P144"><text:s text:c="2"/>void main(void)</text:p>
      <text:p text:style-name="P145"><text:s text:c="2"/>{</text:p>
      <text:p text:style-name="P146"><text:s text:c="5"/>double x = sqrt(2.0); /* raiz de 2 */</text:p>
      <text:p text:style-name="P147"><text:s text:c="5"/>printf(“%lf”, x);</text:p>
      <text:p text:style-name="P148"><text:s text:c="2"/>}</text:p>
      <text:p text:style-name="P149"/>
      <text:p text:style-name="P150"><text:span text:style-name="T151">d)#include &lt;stdio.h&gt;</text:span><text:span text:style-name="T152">VAI IMPRIMIR A TABELA ASCII</text:span><text:span text:style-name="T153"><text:s text:c="2"/></text:span></text:p>
      <text:p text:style-name="P154"><text:s text:c="2"/>void main(void)</text:p>
      <text:p text:style-name="P155"><text:s text:c="2"/>{</text:p>
      <text:p text:style-name="P156"><text:s text:c="5"/>unsigned char ch;</text:p>
      <text:p text:style-name="P157"><text:s text:c="5"/>for(ch=0; ch&lt;256; ch++)</text:p>
      <text:p text:style-name="P158"><text:s text:c="7"/>printf(“\n%3d\t%02X\t%c”, ch,ch,ch);</text:p>
      <text:p text:style-name="P159"><text:s text:c="2"/>}</text:p>
      <text:p text:style-name="P160"/>
      <text:p text:style-name="P161">e) #include &lt;stdio.h&gt;</text:p>
      <text:p text:style-name="P162"><text:s text:c="3"/>void main(void)</text:p>
      <text:p text:style-name="P163"><text:span text:style-name="T164"><text:s text:c="3"/></text:span><text:span text:style-name="T165">{</text:span></text:p>
      <text:p text:style-name="P166"><text:s text:c="6"/>unsigned int mascara = 0x8000;</text:p>
      <text:p text:style-name="P167"><text:s text:c="6"/>int valor;</text:p>
      <text:p text:style-name="P168"/>
      <text:p text:style-name="P169"><text:s text:c="6"/>printf("\nDigite um valor:");</text:p>
      <text:p text:style-name="P170"><text:s text:c="6"/>scanf("%d", &amp;valor);</text:p>
      <text:p text:style-name="P171"><text:s text:c="6"/>while(mascara) {</text:p>
      <text:p text:style-name="P172"><text:s text:c="9"/>printf("%d", (valor &amp; mascara) ? 1 : 0);</text:p>
      <text:p text:style-name="P173"><text:s text:c="9"/>mascara &gt;&gt;= 1;</text:p>
      <text:p text:style-name="P174"><text:span text:style-name="T175"><text:s text:c="6"/>}</text:span><text:span text:style-name="T176">IMPRIME O VALOR EM BINARIO</text:span></text:p>
      <text:p text:style-name="P177"><text:s text:c="3"/>}</text:p>
      <text:p text:style-name="P178"/>
      <text:p text:style-name="P179"/>
      <text:p text:style-name="P180">III – Escrever programas:</text:p>
      <text:p text:style-name="P181"/>
      <text:p text:style-name="P182">1) Lê caracteres do teclado enquanto não se digitar ESC(ASCII 27). Para cada caracter lido, classificá-lo como:</text:p>
      <text:p text:style-name="P183"/>
      <text:p text:style-name="P184">- Caracter de controle:<text:s/><text:tab/>0 a 31 e 127</text:p>
      <text:p text:style-name="P185">- Caracter alfabético maiúsculo:<text:s/><text:tab/>65 a 90</text:p>
      <text:p text:style-name="P186">- Caracter alfabético minúsculo:<text:tab/>97 a 122</text:p>
      <text:p text:style-name="P187">- Caracter numérico:<text:s/><text:tab/>48 a 57</text:p>
      <text:p text:style-name="P188">- Caracter de pontuação: imprimível, não alfabético e não numérico.</text:p>
      <text:p text:style-name="P189"/>
      <text:p text:style-name="Recuodecorpodetexto2">Obs.: Caracter imprimível: 32 a 126. Caracter alfabético: maiúsculos + minúsculos</text:p>
      <text:p text:style-name="P190"/>
      <text:p text:style-name="P191"/>
      <text:p text:style-name="P192">#include &lt;stdio.h&gt;</text:p>
      <text:p text:style-name="P193">#include &lt;conio.h&gt;</text:p>
      <text:p text:style-name="P194">#define ESC 27</text:p>
      <text:p text:style-name="P195"/>
      <text:p text:style-name="P196"/>
      <text:p text:style-name="P197"/>
      <text:p text:style-name="P198">int main(){</text:p>
      <text:p text:style-name="P199"><text:tab/>int control=0,alfaMai=0,alfaMin=0,num=0,imprimivel=0;</text:p>
      <text:p text:style-name="P200"><text:tab/>unsigned char tecla;</text:p>
      <text:p text:style-name="P201"><text:tab/>tecla=getch();</text:p>
      <text:p text:style-name="P202"><text:tab/>while(tecla!= ESC){</text:p>
      <text:p text:style-name="P203"><text:tab/><text:tab/>//Caracter de controle:<text:s/><text:tab/>0 a 31 e 127</text:p>
      <text:p text:style-name="P204"><text:tab/><text:tab/>if(tecla&gt;=1 &amp;&amp; tecla&lt;=31 ||tecla ==127)</text:p>
      <text:p text:style-name="P205"><text:tab/><text:tab/>{</text:p>
      <text:p text:style-name="P206"><text:tab/><text:tab/><text:tab/>control++;</text:p>
      <text:p text:style-name="P207"><text:tab/><text:tab/>}</text:p>
      <text:p text:style-name="P208"><text:tab/><text:tab/>//Caracter alfabético maiúsculo:<text:s/><text:tab/>65 a 90</text:p>
      <text:p text:style-name="P209"><text:tab/><text:tab/>if(tecla&gt;=65 &amp;&amp; tecla&lt;=90){</text:p>
      <text:p text:style-name="P210"><text:tab/><text:tab/><text:tab/>alfaMai++;</text:p>
      <text:p text:style-name="P211"><text:tab/><text:tab/>}</text:p>
      <text:p text:style-name="P212"><text:tab/><text:tab/>//Caracter alfabético minúsculo:<text:tab/>97 a 122</text:p>
      <text:p text:style-name="P213"><text:tab/><text:tab/>if(tecla&gt;=97 &amp;&amp; tecla&lt;=122)</text:p>
      <text:p text:style-name="P214"><text:tab/><text:tab/>{</text:p>
      <text:p text:style-name="P215"><text:tab/><text:tab/><text:tab/>alfaMin++;</text:p>
      <text:p text:style-name="P216"><text:tab/></text:p>
      <text:p text:style-name="P217"><text:tab/><text:tab/>}</text:p>
      <text:p text:style-name="P218"><text:tab/><text:tab/>//Caracter numérico:<text:s/><text:tab/>48 a 57</text:p>
      <text:p text:style-name="P219"><text:tab/><text:tab/>if(tecla&gt;=48 &amp;&amp; tecla&lt;=57){</text:p>
      <text:p text:style-name="P220"><text:tab/><text:tab/><text:tab/>num++;</text:p>
      <text:p text:style-name="P221"><text:tab/><text:tab/>}</text:p>
      <text:p text:style-name="P222"><text:tab/><text:tab/>//Caracter de pontuação: imprimível, não alfabético e não numérico.</text:p>
      <text:p text:style-name="P223"><text:tab/><text:tab/>if(tecla&gt;=32 &amp;&amp; tecla&lt;=126)</text:p>
      <text:p text:style-name="P224"><text:tab/><text:tab/>{</text:p>
      <text:p text:style-name="P225"><text:tab/><text:tab/><text:tab/>imprimivel++;</text:p>
      <text:p text:style-name="P226"><text:tab/><text:tab/>}</text:p>
      <text:p text:style-name="P227"><text:tab/><text:tab/>printf("\n %c",tecla);</text:p>
      <text:p text:style-name="P228"><text:tab/><text:tab/>tecla=getch();</text:p>
      <text:p text:style-name="P229"><text:tab/>}</text:p>
      <text:p text:style-name="P230"><text:tab/>printf("\n %d controle\n %d alfabético maiúsculo\n %d alfabetico minusculo\n %d numerico\n %d imprimivel",control,alfaMai,alfaMin,num,imprimivel);</text:p>
      <text:p text:style-name="P231">}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>2) Lê do teclado 5 números inteiros, e fornece:</text:p>
      <text:p text:style-name="P248"/>
      <text:p text:style-name="P249">- A média aritmética</text:p>
      <text:p text:style-name="P250">- O produto dos 3 primeiros.</text:p>
      <text:p text:style-name="P251">- Quantidade de dígitos (casas) do primeiro valor, através de sucessivas divisões por 10.</text:p>
      <text:p text:style-name="P252"/>
      <text:p text:style-name="P253">int media(int a,int b,int c,int d,int e);</text:p>
      <text:p text:style-name="P254">int prod(int a,int b,int c);</text:p>
      <text:p text:style-name="P255">int qtd_casas(int a);</text:p>
      <text:p text:style-name="P256">#include &lt;stdio.h&gt;</text:p>
      <text:p text:style-name="P257">#include &lt;conio.h&gt;</text:p>
      <text:p text:style-name="P258"/>
      <text:p text:style-name="P259">int main(){</text:p>
      <text:p text:style-name="P260"><text:tab/>int a,b,c,d,e;</text:p>
      <text:p text:style-name="P261"><text:tab/>scanf("%d %d %d %d %d",&amp;a,&amp;b,&amp;c,&amp;d,&amp;e);</text:p>
      <text:p text:style-name="P262"><text:tab/>printf("A media e: %d \n",media(a,b,c,d,e));</text:p>
      <text:p text:style-name="P263"><text:tab/>printf("O prod dos tres primeiros e: %d \n",prod(a,b,c));</text:p>
      <text:p text:style-name="P264"><text:tab/>printf("O prod dos tres primeiros e: %d \n",prod(a,b,c));</text:p>
      <text:p text:style-name="P265"><text:tab/>printf("O primeiro valor tem %d casas",qtd_casas(a));</text:p>
      <text:p text:style-name="P266">}</text:p>
      <text:p text:style-name="P267">int media(int a,int b,int c,int d,int e)</text:p>
      <text:p text:style-name="P268">{</text:p>
      <text:p text:style-name="P269"><text:tab/>int m;</text:p>
      <text:p text:style-name="P270"><text:tab/>m=(a+b+c+d+e)/5;</text:p>
      <text:p text:style-name="P271"><text:tab/>return m;</text:p>
      <text:p text:style-name="P272">}</text:p>
      <text:p text:style-name="P273">int prod(int a,int b,int c)</text:p>
      <text:p text:style-name="P274">{</text:p>
      <text:p text:style-name="P275"><text:tab/>int prod;</text:p>
      <text:p text:style-name="P276"><text:tab/>prod=a*b*c;</text:p>
      <text:p text:style-name="P277"><text:tab/>return prod;</text:p>
      <text:p text:style-name="P278">}</text:p>
      <text:p text:style-name="P279">int qtd_casas(int a)</text:p>
      <text:p text:style-name="P280">{</text:p>
      <text:p text:style-name="P281"><text:tab/>int cont=0;</text:p>
      <text:p text:style-name="P282"><text:tab/>while(a&gt;0)</text:p>
      <text:p text:style-name="P283"><text:tab/>{</text:p>
      <text:p text:style-name="P284"><text:tab/><text:tab/>a=a/10;</text:p>
      <text:p text:style-name="P285"><text:tab/><text:tab/>cont++;</text:p>
      <text:p text:style-name="P286"><text:tab/>}</text:p>
      <text:p text:style-name="P287"><text:tab/>return cont;</text:p>
      <text:p text:style-name="P288">}</text:p>
      <text:p text:style-name="P289"/>
      <text:p text:style-name="P290">3)  Lê 3 números double em 3 variáveis: a, b e c. Em seguida, faz troca de valores entre as variáveis de modo que: a &lt;= b &amp;&amp; b &lt;= c.</text:p>
      <text:p text:style-name="P291"/>
      <text:p text:style-name="P292">IV – Escrever macros:</text:p>
      <text:p text:style-name="P293"/>
      <text:p text:style-name="P294"><text:span text:style-name="T295">1) </text:span><text:span text:style-name="T296">bissexto(ano);</text:span></text:p>
      <text:p text:style-name="P297"/>
      <text:p text:style-name="P298"><text:span text:style-name="T299">Esta macro deverá retornar 1 se<text:s/></text:span><text:span text:style-name="T300">ano</text:span><text:span text:style-name="T301"><text:s/>for um ano bissexto, i.e, divisível por 4 e não por 100, ou divisível por<text:s/></text:span><text:span text:style-name="T302">40</text:span><text:span text:style-name="T303">0; e<text:s/></text:span><text:span text:style-name="T304">0</text:span><text:span text:style-name="T305"><text:s/>se não for.</text:span></text:p>
      <text:p text:style-name="P306">#define bissexto(n)<text:s/>(n%4==0 &amp;&amp;n%100!=0 ||n%400==0)?1:0<text:s/></text:p>
      <text:p text:style-name="Corpodetexto2">2) <text:span text:style-name="T307">para_maiusculo(ch)</text:span></text:p>
      <text:p text:style-name="Corpodetexto2"/>
      <text:p text:style-name="Corpodetexto2">Se ch é letra minúscula, retornar a letra maiúscula correspondente, senão, retornar o próprio ch.</text:p>
      <text:p text:style-name="P308"/>
      <text:p text:style-name="P309">V - Explique com suas próprias palavras:</text:p>
      <text:p text:style-name="P310"/>
      <text:p text:style-name="P311">1) O que é e qual a principal importância de um protótipo de função?</text:p>
      <text:p text:style-name="P312">O compilador não<text:s/>vai<text:s/>reconhecer a existência daquela<text:s/>função</text:p>
      <text:p text:style-name="P313">2) Qual a principal diferença entre um função e uma macro parametrizada?</text:p>
      <text:p text:style-name="P314">Função são algo mais complexos<text:s/>e macro parametrizada servem para coisas simples</text:p>
      <text:p text:style-name="P315">3) O que caracteriza um deslocamento de bits à direita do tipo aritmético?</text:p>
      <text:p text:style-name="P316">&gt;&gt;</text:p>
      <text:p text:style-name="Recuodecorpodetexto3">4) Por que quando se escreve uma macro parametrizada, o parâmetro e a expressão completa devem ser escritos entre parêntese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4pt" style:font-size-asian="14pt" style:font-size-complex="14pt" fo:hyphenate="false"/>
    </style:style>
    <style:style style:name="Normal" style:display-name="Normal" style:family="paragraph">
      <style:paragraph-properties style:text-autospace="none" fo:margin-bottom="0in" fo:line-height="100%"/>
      <style:text-properties style:font-name="Times New Roman" fo:font-size="12pt" style:font-size-asian="12pt" style:font-size-complex="12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Corpodetexto2" style:display-name="Corpo de texto 2" style:family="paragraph" style:parent-style-name="Normal">
      <style:paragraph-properties fo:text-align="justify"/>
      <style:text-properties fo:font-size="10pt" style:font-size-asian="10pt" style:font-size-complex="10pt" fo:hyphenate="false"/>
    </style:style>
    <style:style style:name="Corpodetexto2Char" style:display-name="Corpo de texto 2 Char" style:family="text" style:parent-style-name="Fonteparág.padrão">
      <style:text-properties style:font-name="Times New Roman" style:font-name-complex="Times New Roman" fo:font-size="12pt" style:font-size-asian="12pt" style:font-size-complex="12pt"/>
    </style:style>
    <style:style style:name="Lista" style:display-name="Lista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Commarcadores2" style:display-name="Com marcadores 2" style:family="paragraph" style:parent-style-name="Normal" style:auto-update="true" style:list-style-name="LFO2">
      <style:text-properties fo:hyphenate="false"/>
    </style:style>
    <style:style style:name="Listadecontinuação" style:display-name="Lista de continuaçã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Título" style:display-name="Título" style:family="paragraph" style:parent-style-name="Normal" style:default-outline-level="1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 style:parent-style-name="Fonteparág.padrão">
      <style:text-properties style:font-name="Times New Roman" style:font-name-complex="Times New Roman" fo:font-size="12pt" style:font-size-asian="12pt" style:font-size-complex="12pt"/>
    </style:style>
    <style:style style:name="Subtítulo" style:display-name="Subtítulo" style:family="paragraph" style:parent-style-name="Normal" style:default-outline-level="2">
      <style:paragraph-properties fo:text-align="center" fo:margin-bottom="0.0416in"/>
      <style:text-properties style:font-name="Arial" style:font-name-complex="Arial" fo:hyphenate="false"/>
    </style:style>
    <style:style style:name="SubtítuloChar" style:display-name="Subtítulo Char" style:family="text" style:parent-style-name="Fonteparág.padrão">
      <style:text-properties style:font-name="Cambria" style:font-name-asian="Times New Roman" style:font-name-complex="Times New Roman" fo:font-size="12pt" style:font-size-asian="12pt" style:font-size-complex="12pt"/>
    </style:style>
    <style:style style:name="Recuodecorpodetexto2" style:display-name="Recuo de corpo de texto 2" style:family="paragraph" style:parent-style-name="Normal">
      <style:paragraph-properties fo:text-align="justify" fo:margin-left="0.5312in" fo:text-indent="-0.3937in">
        <style:tab-stops/>
      </style:paragraph-properties>
      <style:text-properties fo:font-size="10pt" style:font-size-asian="10pt" style:font-size-complex="10pt" fo:hyphenate="false"/>
    </style:style>
    <style:style style:name="Recuodecorpodetexto2Char" style:display-name="Recuo de corpo de texto 2 Char" style:family="text" style:parent-style-name="Fonteparág.padrão">
      <style:text-properties style:font-name="Times New Roman" style:font-name-complex="Times New Roman" fo:font-size="12pt" style:font-size-asian="12pt" style:font-size-complex="12pt"/>
    </style:style>
    <style:style style:name="Recuodecorpodetexto3" style:display-name="Recuo de corpo de texto 3" style:family="paragraph" style:parent-style-name="Normal">
      <style:paragraph-properties fo:text-align="justify" fo:margin-left="0.1576in" fo:text-indent="-0.1576in">
        <style:tab-stops/>
      </style:paragraph-properties>
      <style:text-properties fo:font-size="10pt" style:font-size-asian="10pt" style:font-size-complex="10pt" fo:hyphenate="false"/>
    </style:style>
    <style:style style:name="Recuodecorpodetexto3Char" style:display-name="Recuo de corpo de texto 3 Char" style:family="text" style:parent-style-name="Fonteparág.padrão">
      <style:text-properties style:font-name="Times New Roman" style:font-name-complex="Times New Roman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text:style-name="WW_CharLFO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44in" fo:page-height="8.2687in" style:print-orientation="landscape" fo:margin-top="1.1812in" fo:margin-left="0.9847in" fo:margin-bottom="1.1812in" fo:margin-right="0.9847in" style:num-format="1" style:writing-mode="lr-tb">
        <style:columns fo:column-count="2" fo:column-gap="0.3152in">
          <style:column-sep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ACULDADE DE TECNOLOGIA DE SÃO PAULO</dc:title>
    <dc:description/>
    <dc:subject/>
    <meta:initial-creator>Word Development</meta:initial-creator>
    <dc:creator>Patrick Natan</dc:creator>
    <meta:creation-date>2019-03-21T09:41:00Z</meta:creation-date>
    <dc:date>2019-03-21T09:41:00Z</dc:date>
    <meta:template xlink:href="Normal.dotm" xlink:type="simple"/>
    <meta:editing-cycles>3</meta:editing-cycles>
    <meta:editing-duration>PT0S</meta:editing-duration>
    <meta:document-statistic meta:page-count="1" meta:paragraph-count="10" meta:word-count="809" meta:character-count="5168" meta:row-count="36" meta:non-whitespace-character-count="4369"/>
  </office:meta>
</office:document-meta>
</file>