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0pt" style:font-size-asian="10pt" style:font-size-complex="10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6" style:parent-style-name="Normal" style:family="paragraph">
      <style:text-properties fo:font-size="10pt" style:font-size-asian="10pt" style:font-size-complex="10pt"/>
    </style:style>
    <style:style style:name="P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8" style:parent-style-name="Normal" style:family="paragraph">
      <style:text-properties fo:font-size="10pt" style:font-size-asian="10pt" style:font-size-complex="10pt"/>
    </style:style>
    <style:style style:name="P9" style:parent-style-name="Normal" style:family="paragraph">
      <style:paragraph-properties fo:margin-left="0.768in" fo:text-indent="-0.768in">
        <style:tab-stops/>
      </style:paragraph-properties>
    </style:style>
    <style:style style:name="T10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11" style:parent-style-name="Fonteparág.padrão" style:family="text">
      <style:text-properties style:font-name="Courier New" style:font-name-complex="Courier New" fo:color="#FF0000" fo:font-size="10pt" style:font-size-asian="10pt" style:font-size-complex="10pt"/>
    </style:style>
    <style:style style:name="T12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13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14" style:parent-style-name="Fonteparág.padrão" style:family="text">
      <style:text-properties fo:font-size="10pt" style:font-size-asian="10pt" style:font-size-complex="10pt"/>
    </style:style>
    <style:style style:name="P15" style:parent-style-name="Normal" style:family="paragraph">
      <style:paragraph-properties fo:margin-left="0.768in" fo:text-indent="-0.768in">
        <style:tab-stops/>
      </style:paragraph-properties>
    </style:style>
    <style:style style:name="T16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17" style:parent-style-name="Fonteparág.padrão" style:family="text">
      <style:text-properties fo:font-size="10pt" style:font-size-asian="10pt" style:font-size-complex="10pt"/>
    </style:style>
    <style:style style:name="T18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19" style:parent-style-name="Fonteparág.padrão" style:family="text">
      <style:text-properties fo:font-size="10pt" style:font-size-asian="10pt" style:font-size-complex="10pt"/>
    </style:style>
    <style:style style:name="T20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21" style:parent-style-name="Fonteparág.padrão" style:family="text">
      <style:text-properties fo:font-size="10pt" style:font-size-asian="10pt" style:font-size-complex="10pt"/>
    </style:style>
    <style:style style:name="P22" style:parent-style-name="Normal" style:family="paragraph">
      <style:paragraph-properties fo:margin-left="0.768in" fo:text-indent="-0.768in">
        <style:tab-stops/>
      </style:paragraph-properties>
      <style:text-properties fo:font-size="10pt" style:font-size-asian="10pt" style:font-size-complex="10pt"/>
    </style:style>
    <style:style style:name="P23" style:parent-style-name="Normal" style:family="paragraph">
      <style:paragraph-properties fo:margin-left="0.768in" fo:text-indent="-0.768in">
        <style:tab-stops/>
      </style:paragraph-properties>
    </style:style>
    <style:style style:name="T24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25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26" style:parent-style-name="Fonteparág.padrão" style:family="text">
      <style:text-properties fo:font-size="10pt" style:font-size-asian="10pt" style:font-size-complex="10pt"/>
    </style:style>
    <style:style style:name="T27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28" style:parent-style-name="Fonteparág.padrão" style:family="text">
      <style:text-properties fo:font-size="10pt" style:font-size-asian="10pt" style:font-size-complex="10pt"/>
    </style:style>
    <style:style style:name="P29" style:parent-style-name="Normal" style:family="paragraph">
      <style:paragraph-properties fo:margin-left="0.768in" fo:text-indent="-0.768in">
        <style:tab-stops/>
      </style:paragraph-properties>
    </style:style>
    <style:style style:name="T30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31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32" style:parent-style-name="Fonteparág.padrão" style:family="text">
      <style:text-properties fo:font-size="10pt" style:font-size-asian="10pt" style:font-size-complex="10pt"/>
    </style:style>
    <style:style style:name="T33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P34" style:parent-style-name="Normal" style:family="paragraph">
      <style:paragraph-properties fo:margin-left="0.768in" fo:text-indent="-0.768in">
        <style:tab-stops/>
      </style:paragraph-properties>
    </style:style>
    <style:style style:name="T35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36" style:parent-style-name="Fonteparág.padrão" style:family="text">
      <style:text-properties fo:font-size="10pt" style:font-size-asian="10pt" style:font-size-complex="10pt"/>
    </style:style>
    <style:style style:name="T37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38" style:parent-style-name="Fonteparág.padrão" style:family="text">
      <style:text-properties fo:font-size="10pt" style:font-size-asian="10pt" style:font-size-complex="10pt"/>
    </style:style>
    <style:style style:name="P39" style:parent-style-name="Normal" style:family="paragraph">
      <style:paragraph-properties fo:margin-left="0.768in" fo:text-indent="-0.768in">
        <style:tab-stops/>
      </style:paragraph-properties>
    </style:style>
    <style:style style:name="T40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41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42" style:parent-style-name="Fonteparág.padrão" style:family="text">
      <style:text-properties fo:font-size="10pt" style:font-size-asian="10pt" style:font-size-complex="10pt"/>
    </style:style>
    <style:style style:name="T43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44" style:parent-style-name="Fonteparág.padrão" style:family="text">
      <style:text-properties fo:font-size="10pt" style:font-size-asian="10pt" style:font-size-complex="10pt"/>
    </style:style>
    <style:style style:name="P45" style:parent-style-name="Normal" style:family="paragraph">
      <style:paragraph-properties fo:margin-left="0.768in" fo:text-indent="-0.768in">
        <style:tab-stops/>
      </style:paragraph-properties>
    </style:style>
    <style:style style:name="T46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47" style:parent-style-name="Fonteparág.padrão" style:family="text">
      <style:text-properties fo:font-size="10pt" style:font-size-asian="10pt" style:font-size-complex="10pt"/>
    </style:style>
    <style:style style:name="T48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49" style:parent-style-name="Fonteparág.padrão" style:family="text">
      <style:text-properties fo:font-size="10pt" style:font-size-asian="10pt" style:font-size-complex="10pt"/>
    </style:style>
    <style:style style:name="P50" style:parent-style-name="Normal" style:family="paragraph">
      <style:paragraph-properties fo:margin-left="0.768in" fo:text-indent="-0.768in">
        <style:tab-stops/>
      </style:paragraph-properties>
    </style:style>
    <style:style style:name="T51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52" style:parent-style-name="Fonteparág.padrão" style:family="text">
      <style:text-properties fo:font-size="10pt" style:font-size-asian="10pt" style:font-size-complex="10pt"/>
    </style:style>
    <style:style style:name="T53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54" style:parent-style-name="Fonteparág.padrão" style:family="text">
      <style:text-properties fo:font-size="10pt" style:font-size-asian="10pt" style:font-size-complex="10pt"/>
    </style:style>
    <style:style style:name="P55" style:parent-style-name="Normal" style:family="paragraph">
      <style:paragraph-properties fo:margin-left="0.768in" fo:text-indent="-0.768in">
        <style:tab-stops/>
      </style:paragraph-properties>
    </style:style>
    <style:style style:name="T56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57" style:parent-style-name="Fonteparág.padrão" style:family="text">
      <style:text-properties fo:font-size="10pt" style:font-size-asian="10pt" style:font-size-complex="10pt"/>
    </style:style>
    <style:style style:name="T58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59" style:parent-style-name="Fonteparág.padrão" style:family="text">
      <style:text-properties fo:font-size="10pt" style:font-size-asian="10pt" style:font-size-complex="10pt"/>
    </style:style>
    <style:style style:name="P60" style:parent-style-name="Normal" style:family="paragraph">
      <style:paragraph-properties fo:margin-left="0.768in" fo:text-indent="-0.768in">
        <style:tab-stops/>
      </style:paragraph-properties>
    </style:style>
    <style:style style:name="T61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62" style:parent-style-name="Fonteparág.padrão" style:family="text">
      <style:text-properties fo:font-size="10pt" style:font-size-asian="10pt" style:font-size-complex="10pt"/>
    </style:style>
    <style:style style:name="T63" style:parent-style-name="Fonteparág.padrão" style:family="text">
      <style:text-properties fo:font-size="10pt" style:font-size-asian="10pt" style:font-size-complex="10pt"/>
    </style:style>
    <style:style style:name="T64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65" style:parent-style-name="Fonteparág.padrão" style:family="text">
      <style:text-properties fo:font-size="10pt" style:font-size-asian="10pt" style:font-size-complex="10pt"/>
    </style:style>
    <style:style style:name="T66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67" style:parent-style-name="Fonteparág.padrão" style:family="text">
      <style:text-properties fo:font-size="10pt" style:font-size-asian="10pt" style:font-size-complex="10pt"/>
    </style:style>
    <style:style style:name="P68" style:parent-style-name="Normal" style:family="paragraph">
      <style:paragraph-properties fo:margin-left="0.768in" fo:text-indent="-0.768in">
        <style:tab-stops/>
      </style:paragraph-properties>
    </style:style>
    <style:style style:name="T69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70" style:parent-style-name="Fonteparág.padrão" style:family="text">
      <style:text-properties fo:font-size="10pt" style:font-size-asian="10pt" style:font-size-complex="10pt"/>
    </style:style>
    <style:style style:name="T71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72" style:parent-style-name="Fonteparág.padrão" style:family="text">
      <style:text-properties fo:font-size="10pt" style:font-size-asian="10pt" style:font-size-complex="10pt"/>
    </style:style>
    <style:style style:name="T73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74" style:parent-style-name="Fonteparág.padrão" style:family="text">
      <style:text-properties fo:font-size="10pt" style:font-size-asian="10pt" style:font-size-complex="10pt"/>
    </style:style>
    <style:style style:name="T75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76" style:parent-style-name="Fonteparág.padrão" style:family="text">
      <style:text-properties fo:font-size="10pt" style:font-size-asian="10pt" style:font-size-complex="10pt"/>
    </style:style>
    <style:style style:name="P77" style:parent-style-name="Normal" style:family="paragraph">
      <style:paragraph-properties fo:margin-left="0.768in" fo:text-indent="-0.768in">
        <style:tab-stops/>
      </style:paragraph-properties>
    </style:style>
    <style:style style:name="T78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79" style:parent-style-name="Fonteparág.padrão" style:family="text">
      <style:text-properties fo:font-size="10pt" style:font-size-asian="10pt" style:font-size-complex="10pt"/>
    </style:style>
    <style:style style:name="T80" style:parent-style-name="Fonteparág.padrão" style:family="text">
      <style:text-properties fo:font-size="10pt" style:font-size-asian="10pt" style:font-size-complex="10pt"/>
    </style:style>
    <style:style style:name="P81" style:parent-style-name="Normal" style:family="paragraph">
      <style:paragraph-properties fo:margin-left="0.768in" fo:text-indent="-0.768in">
        <style:tab-stops/>
      </style:paragraph-properties>
      <style:text-properties fo:font-size="10pt" style:font-size-asian="10pt" style:font-size-complex="10pt"/>
    </style:style>
    <style:style style:name="P82" style:parent-style-name="Normal" style:family="paragraph">
      <style:paragraph-properties fo:margin-left="0.768in" fo:text-indent="-0.768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83" style:parent-style-name="Normal" style:family="paragraph">
      <style:paragraph-properties fo:margin-left="0.768in" fo:text-indent="-0.768in">
        <style:tab-stops/>
      </style:paragraph-properties>
      <style:text-properties fo:font-size="10pt" style:font-size-asian="10pt" style:font-size-complex="10pt"/>
    </style:style>
    <style:style style:name="P84" style:parent-style-name="Normal" style:family="paragraph">
      <style:paragraph-properties fo:margin-left="0.768in" fo:text-indent="-0.768in">
        <style:tab-stops/>
      </style:paragraph-properties>
    </style:style>
    <style:style style:name="T85" style:parent-style-name="Fonteparág.padrão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6" style:parent-style-name="Fonteparág.padrão" style:family="text">
      <style:text-properties style:font-name="Courier New" style:font-name-complex="Courier New" fo:color="#FF0000" fo:font-size="10pt" style:font-size-asian="10pt" style:font-size-complex="10pt" fo:language="en" fo:country="US"/>
    </style:style>
    <style:style style:name="P87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88" style:parent-style-name="Normal" style:family="paragraph">
      <style:paragraph-properties fo:margin-left="0.768in" fo:text-indent="-0.768in">
        <style:tab-stops/>
      </style:paragraph-properties>
    </style:style>
    <style:style style:name="T89" style:parent-style-name="Fonteparág.padrão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0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P91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92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93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94" style:parent-style-name="Normal" style:family="paragraph">
      <style:paragraph-properties fo:margin-left="0.768in" fo:text-indent="-0.768in">
        <style:tab-stops/>
      </style:paragraph-properties>
    </style:style>
    <style:style style:name="T95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96" style:parent-style-name="Fonteparág.padrão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97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98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99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00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01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02" style:parent-style-name="Normal" style:family="paragraph">
      <style:paragraph-properties fo:margin-left="0.768in" fo:text-indent="-0.768in">
        <style:tab-stops/>
      </style:paragraph-properties>
    </style:style>
    <style:style style:name="T103" style:parent-style-name="Fonteparág.padrão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04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P105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06" style:parent-style-name="Normal" style:family="paragraph">
      <style:paragraph-properties fo:margin-left="0.768in" fo:text-indent="-0.768in">
        <style:tab-stops/>
      </style:paragraph-properties>
    </style:style>
    <style:style style:name="T107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108" style:parent-style-name="Fonteparág.padrão" style:family="text">
      <style:text-properties style:font-name="Courier New" style:font-name-complex="Courier New" fo:color="#FF0000" fo:font-size="10pt" style:font-size-asian="10pt" style:font-size-complex="10pt"/>
    </style:style>
    <style:style style:name="P109" style:parent-style-name="Normal" style:family="paragraph">
      <style:paragraph-properties fo:margin-left="0.768in" fo:text-indent="-0.768in">
        <style:tab-stops/>
      </style:paragraph-properties>
    </style:style>
    <style:style style:name="T110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111" style:parent-style-name="Fonteparág.padrão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2" style:parent-style-name="Fonteparág.padrão" style:family="text">
      <style:text-properties style:font-name="Courier New" style:font-name-complex="Courier New" fo:color="#FF0000" fo:font-size="10pt" style:font-size-asian="10pt" style:font-size-complex="10pt" fo:language="en" fo:country="US"/>
    </style:style>
    <style:style style:name="P113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14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15" style:parent-style-name="Normal" style:family="paragraph">
      <style:paragraph-properties fo:margin-left="0.768in" fo:text-indent="-0.768in">
        <style:tab-stops/>
      </style:paragraph-properties>
    </style:style>
    <style:style style:name="T116" style:parent-style-name="Fonteparág.padrão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7" style:parent-style-name="Fonteparág.padrão" style:family="text">
      <style:text-properties style:font-name="Courier New" style:font-name-complex="Courier New" fo:color="#FF0000" fo:font-size="10pt" style:font-size-asian="10pt" style:font-size-complex="10pt" fo:language="en" fo:country="US"/>
    </style:style>
    <style:style style:name="P118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19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20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21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22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23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24" style:parent-style-name="Normal" style:family="paragraph">
      <style:paragraph-properties fo:margin-left="0.768in" fo:text-indent="-0.768in">
        <style:tab-stops/>
      </style:paragraph-properties>
    </style:style>
    <style:style style:name="T125" style:parent-style-name="Fonteparág.padrão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6" style:parent-style-name="Fonteparág.padrão" style:family="text">
      <style:text-properties style:font-name="Courier New" style:font-name-complex="Courier New" fo:color="#FF0000" fo:font-size="10pt" style:font-size-asian="10pt" style:font-size-complex="10pt" fo:language="en" fo:country="US"/>
    </style:style>
    <style:style style:name="P127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28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29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30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31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32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33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34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35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36" style:parent-style-name="Normal" style:family="paragraph">
      <style:paragraph-properties fo:margin-left="0.768in" fo:text-indent="-0.768in">
        <style:tab-stops/>
      </style:paragraph-properties>
    </style:style>
    <style:style style:name="T137" style:parent-style-name="Fonteparág.padrão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8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P139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40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41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42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43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44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45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46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47" style:parent-style-name="Normal" style:family="paragraph">
      <style:paragraph-properties fo:margin-left="0.768in" fo:text-indent="-0.768in">
        <style:tab-stops/>
      </style:paragraph-properties>
    </style:style>
    <style:style style:name="T148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149" style:parent-style-name="Fonteparág.padrão" style:family="text">
      <style:text-properties style:font-name="Courier New" style:font-name-complex="Courier New" fo:color="#FF0000" fo:font-size="10pt" style:font-size-asian="10pt" style:font-size-complex="10pt"/>
    </style:style>
    <style:style style:name="T150" style:parent-style-name="Fonteparág.padrão" style:family="text">
      <style:text-properties style:font-name="Courier New" style:font-name-complex="Courier New" fo:color="#FF0000" fo:font-size="10pt" style:font-size-asian="10pt" style:font-size-complex="10pt"/>
    </style:style>
    <style:style style:name="P151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52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53" style:parent-style-name="Normal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P154" style:parent-style-name="Normal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P155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156" style:parent-style-name="Corpodetexto2" style:family="paragraph">
      <style:paragraph-properties fo:margin-left="0.1375in" fo:text-indent="-0.1375in">
        <style:tab-stops/>
      </style:paragraph-properties>
    </style:style>
    <style:style style:name="P157" style:parent-style-name="Normal" style:family="paragraph">
      <style:paragraph-properties fo:text-align="justify" fo:margin-left="0.1375in" fo:text-indent="-0.1375in">
        <style:tab-stops/>
      </style:paragraph-properties>
      <style:text-properties fo:font-size="10pt" style:font-size-asian="10pt" style:font-size-complex="10pt"/>
    </style:style>
    <style:style style:name="P158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59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60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61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62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63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64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65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66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67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68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69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70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71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72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73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74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75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76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77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78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79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80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81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82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83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84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85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86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87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88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89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90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91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92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93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94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95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96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97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98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99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00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01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02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03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04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05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06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07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08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09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10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11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12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13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14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15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16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17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18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19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20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21" style:parent-style-name="Normal" style:family="paragraph">
      <style:paragraph-properties>
        <style:tab-stops>
          <style:tab-stop style:type="left" style:position="0.7875in"/>
        </style:tab-stops>
      </style:paragraph-properties>
      <style:text-properties fo:font-size="10pt" style:font-size-asian="10pt" style:font-size-complex="10pt"/>
    </style:style>
    <style:style style:name="P222" style:parent-style-name="Normal" style:family="paragraph">
      <style:paragraph-properties>
        <style:tab-stops>
          <style:tab-stop style:type="left" style:position="0.7875in"/>
        </style:tab-stops>
      </style:paragraph-properties>
      <style:text-properties fo:font-size="10pt" style:font-size-asian="10pt" style:font-size-complex="10pt"/>
    </style:style>
    <style:style style:name="P223" style:parent-style-name="Normal" style:family="paragraph">
      <style:paragraph-properties fo:margin-left="0.1576in">
        <style:tab-stops>
          <style:tab-stop style:type="left" style:position="0.6298in"/>
        </style:tab-stops>
      </style:paragraph-properties>
      <style:text-properties fo:font-size="10pt" style:font-size-asian="10pt" style:font-size-complex="10pt"/>
    </style:style>
    <style:style style:name="P224" style:parent-style-name="Normal" style:family="paragraph">
      <style:paragraph-properties fo:margin-left="0.1576in">
        <style:tab-stops>
          <style:tab-stop style:type="left" style:position="0.6298in"/>
        </style:tab-stops>
      </style:paragraph-properties>
      <style:text-properties fo:font-size="10pt" style:font-size-asian="10pt" style:font-size-complex="10pt"/>
    </style:style>
    <style:style style:name="P225" style:parent-style-name="Normal" style:family="paragraph">
      <style:paragraph-properties fo:margin-left="0.2361in" fo:text-indent="-0.0784in">
        <style:tab-stops>
          <style:tab-stop style:type="left" style:position="0.5513in"/>
        </style:tab-stops>
      </style:paragraph-properties>
      <style:text-properties fo:font-size="10pt" style:font-size-asian="10pt" style:font-size-complex="10pt"/>
    </style:style>
    <style:style style:name="P226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27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28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29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30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31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32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33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34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35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36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37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38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39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40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41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42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43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44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45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46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47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48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49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50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51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52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53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54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55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56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57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58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59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60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61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62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63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64" style:parent-style-name="Corpodetexto2" style:family="paragraph">
      <style:paragraph-properties fo:margin-left="0.1375in" fo:text-indent="-0.1375in">
        <style:tab-stops/>
      </style:paragraph-properties>
    </style:style>
    <style:style style:name="P265" style:parent-style-name="Corpodetexto2" style:family="paragraph">
      <style:paragraph-properties fo:margin-left="0.1375in" fo:text-indent="-0.1375in">
        <style:tab-stops/>
      </style:paragraph-properties>
      <style:text-properties fo:color="#FF0000"/>
    </style:style>
    <style:style style:name="P266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67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68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69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70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71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72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73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74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75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76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77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78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79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80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81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82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83" style:parent-style-name="Normal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P284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85" style:parent-style-name="Normal" style:family="paragraph">
      <style:paragraph-properties fo:text-align="justify"/>
    </style:style>
    <style:style style:name="T286" style:parent-style-name="Fonteparág.padrão" style:family="text">
      <style:text-properties fo:font-size="10pt" style:font-size-asian="10pt" style:font-size-complex="10pt"/>
    </style:style>
    <style:style style:name="T287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P288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89" style:parent-style-name="Normal" style:family="paragraph">
      <style:paragraph-properties fo:text-align="justify"/>
    </style:style>
    <style:style style:name="T290" style:parent-style-name="Fonteparág.padrão" style:family="text">
      <style:text-properties fo:font-size="10pt" style:font-size-asian="10pt" style:font-size-complex="10pt"/>
    </style:style>
    <style:style style:name="T291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292" style:parent-style-name="Fonteparág.padrão" style:family="text">
      <style:text-properties fo:font-size="10pt" style:font-size-asian="10pt" style:font-size-complex="10pt"/>
    </style:style>
    <style:style style:name="P293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T294" style:parent-style-name="Fonteparág.padrão" style:family="text">
      <style:text-properties style:font-name="Courier New" style:font-name-complex="Courier New" fo:font-weight="bold" style:font-weight-asian="bold" style:font-weight-complex="bold"/>
    </style:style>
    <style:style style:name="P295" style:parent-style-name="Normal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P296" style:parent-style-name="Normal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P297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98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99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300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301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302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303" style:parent-style-name="Normal" style:family="paragraph">
      <style:paragraph-properties fo:text-align="justify"/>
      <style:text-properties fo:font-size="10pt" style:font-size-asian="10pt" style:font-size-complex="10pt"/>
    </style:style>
  </office:automatic-styles>
  <office:body>
    <office:text text:use-soft-page-breaks="true">
      <text:p text:style-name="P1">FACULDADE DE TECNOLOGIA DE SÃO PAULO</text:p>
      <text:p text:style-name="P2">LP - Linguagem de Programação</text:p>
      <text:p text:style-name="P3"/>
      <text:p text:style-name="P4">LISTA DE EXERCÍCIOS PREPARATÓRIOS</text:p>
      <text:p text:style-name="P5"/>
      <text:p text:style-name="P6"/>
      <text:p text:style-name="P7">I - Assinale V ou F:</text:p>
      <text:p text:style-name="P8"/>
      <text:p text:style-name="P9"><text:span text:style-name="T10">a) (</text:span><text:span text:style-name="T11">F</text:span><text:span text:style-name="T12">) </text:span><text:span text:style-name="T13">MAIN</text:span><text:span text:style-name="T14"><text:s/>é uma palavra chave da Linguagem C.</text:span></text:p>
      <text:p text:style-name="P15"><text:span text:style-name="T16">b) (V) </text:span><text:span text:style-name="T17">Podemos guardar em um<text:s/></text:span><text:span text:style-name="T18">long int</text:span><text:span text:style-name="T19"><text:s/>valores até 2 vezes maior que num<text:s/></text:span><text:span text:style-name="T20">int</text:span><text:span text:style-name="T21">, não mais do que isso.</text:span></text:p>
      <text:p text:style-name="P22"/>
      <text:p text:style-name="P23"><text:span text:style-name="T24">c) (F) </text:span><text:span text:style-name="T25">’\t’</text:span><text:span text:style-name="T26"><text:s/>representa uma tabulação,<text:s/></text:span><text:span text:style-name="T27">‘\2t’</text:span><text:span text:style-name="T28"><text:s/>representa duas tabulações.</text:span></text:p>
      <text:p text:style-name="P29"><text:span text:style-name="T30">d) (F) </text:span><text:span text:style-name="T31">x+=2*t+y;</text:span><text:span text:style-name="T32"><text:s/>é equivalente a<text:s/></text:span><text:span text:style-name="T33">x=x+2*t+y;</text:span></text:p>
      <text:p text:style-name="P34"><text:span text:style-name="T35">e) (V) </text:span><text:span text:style-name="T36">O formato<text:s/></text:span><text:span text:style-name="T37">%c</text:span><text:span text:style-name="T38"><text:s/>imprime caracteres ASCII.</text:span></text:p>
      <text:p text:style-name="P39"><text:span text:style-name="T40">f</text:span><text:span text:style-name="T41">) (F) </text:span><text:span text:style-name="T42">O formato<text:s/></text:span><text:span text:style-name="T43">%C</text:span><text:span text:style-name="T44"><text:s/>imprime caracteres ASCII em maiúsculo.</text:span></text:p>
      <text:p text:style-name="P45"><text:span text:style-name="T46">g) (V) </text:span><text:span text:style-name="T47">O formato<text:s/></text:span><text:span text:style-name="T48">%b</text:span><text:span text:style-name="T49"><text:s/>imprime números em binário.</text:span></text:p>
      <text:p text:style-name="P50"><text:span text:style-name="T51">h) (V) </text:span><text:span text:style-name="T52">O formato<text:s/></text:span><text:span text:style-name="T53">%x</text:span><text:span text:style-name="T54"><text:s/>imprime números em hexadecimal.</text:span></text:p>
      <text:p text:style-name="P55"><text:span text:style-name="T56">i) (V) </text:span><text:span text:style-name="T57">O formato<text:s/></text:span><text:span text:style-name="T58">%X</text:span><text:span text:style-name="T59"><text:s/>imprime números em hexadecimal, dígitos alfabéticos em maiúsculo.</text:span></text:p>
      <text:p text:style-name="P60"><text:span text:style-name="T61">j) (F) </text:span><text:span text:style-name="T62">Seja<text:s/></text:span><text:span text:style-name="T63">a declaração:<text:s/></text:span><text:span text:style-name="T64">int i=0x0F0F;</text:span><text:span text:style-name="T65"><text:s/>assim, a expressão<text:s/></text:span><text:span text:style-name="T66">(!i==~i)</text:span><text:span text:style-name="T67"><text:s/>é verdadeira.</text:span></text:p>
      <text:p text:style-name="P68"><text:span text:style-name="T69">k) (F) </text:span><text:span text:style-name="T70">A diretiva<text:s/></text:span><text:span text:style-name="T71">#define prod(a,b) a*b</text:span><text:span text:style-name="T72"><text:s/>garante a precedência do operador<text:s/></text:span><text:span text:style-name="T73">*</text:span><text:span text:style-name="T74"><text:s/>sobre o operador<text:s/></text:span><text:span text:style-name="T75">+</text:span><text:span text:style-name="T76">.</text:span></text:p>
      <text:p text:style-name="P77"><text:span text:style-name="T78">l) (V)<text:s/></text:span><text:span text:style-name="T79">A chamada de uma função sem o protótipo presente causa erro de compilação em<text:s/></text:span><text:span text:style-name="T80">qualquer compilador.</text:span></text:p>
      <text:p text:style-name="P81"/>
      <text:p text:style-name="P82">II - Qual a saída dos programas a seguir?</text:p>
      <text:p text:style-name="P83"/>
      <text:p text:style-name="P84"><text:span text:style-name="T85">a) #include &lt;stdio.h&gt;<text:s/></text:span><text:span text:style-name="T86">NADA,NÃO ENTRA NO IF</text:span></text:p>
      <text:p text:style-name="P87"><text:s text:c="3"/>int main()</text:p>
      <text:p text:style-name="P88"><text:span text:style-name="T89"><text:s text:c="3"/></text:span><text:span text:style-name="T90">{</text:span></text:p>
      <text:p text:style-name="P91"><text:s text:c="6"/>int al=25;</text:p>
      <text:p text:style-name="P92"><text:s text:c="6"/>if(50&gt;=al&gt;=10)</text:p>
      <text:p text:style-name="P93"><text:s text:c="9"/>printf(“\nEstá dentro do intervalo”);</text:p>
      <text:p text:style-name="P94"><text:span text:style-name="T95"><text:s text:c="3"/></text:span><text:span text:style-name="T96">}</text:span></text:p>
      <text:p text:style-name="P97"/>
      <text:p text:style-name="P98">b)#include &lt;stdio.h&gt;</text:p>
      <text:p text:style-name="P99"><text:s text:c="2"/>#define<text:s/>soma(a,b) a+b</text:p>
      <text:p text:style-name="P100"><text:s text:c="2"/>#define prod(a,b) a*b</text:p>
      <text:p text:style-name="P101"><text:s text:c="2"/>void main(void)</text:p>
      <text:p text:style-name="P102"><text:span text:style-name="T103"><text:s text:c="2"/></text:span><text:span text:style-name="T104">{</text:span></text:p>
      <text:p text:style-name="P105"><text:s text:c="5"/>int i=3, j=5;</text:p>
      <text:p text:style-name="P106"><text:span text:style-name="T107"><text:s text:c="5"/>printf(“%d”, 2*soma(i,j));</text:span><text:span text:style-name="T108">2*3+5=11</text:span></text:p>
      <text:p text:style-name="P109"><text:span text:style-name="T110"><text:s text:c="5"/></text:span><text:span text:style-name="T111">printf(“%d”, prod(i+j,j-i));</text:span><text:span text:style-name="T112">3+5*5-3=25</text:span></text:p>
      <text:p text:style-name="P113"><text:s text:c="2"/>}</text:p>
      <text:p text:style-name="P114"/>
      <text:p text:style-name="P115"><text:span text:style-name="T116">c)#include &lt;stdio.h&gt;</text:span><text:span text:style-name="T117">NADA, TEM QUE IMPORTAR O MATH</text:span></text:p>
      <text:p text:style-name="P118"><text:s text:c="2"/>void main(void)</text:p>
      <text:p text:style-name="P119"><text:s text:c="2"/>{</text:p>
      <text:p text:style-name="P120"><text:s text:c="5"/>double x =<text:s/>sqrt(2.0); /* raiz de 2 */</text:p>
      <text:p text:style-name="P121"><text:s text:c="5"/>printf(“%lf”, x);</text:p>
      <text:p text:style-name="P122"><text:s text:c="2"/>}</text:p>
      <text:p text:style-name="P123"/>
      <text:p text:style-name="P124"><text:span text:style-name="T125">d)#include &lt;stdio.h&gt;</text:span><text:span text:style-name="T126">VAI IMPRIMIR A TABELA ASCII <text:s/></text:span></text:p>
      <text:p text:style-name="P127"><text:s text:c="2"/>void main(void)</text:p>
      <text:p text:style-name="P128"><text:s text:c="2"/>{</text:p>
      <text:p text:style-name="P129"><text:s text:c="5"/>unsigned char ch;</text:p>
      <text:p text:style-name="P130"><text:s text:c="5"/>for(ch=0; ch&lt;256; ch++)</text:p>
      <text:p text:style-name="P131"><text:s text:c="7"/>printf(“\n%3d\t%02X\t%c”, ch,ch,ch);</text:p>
      <text:p text:style-name="P132"><text:s text:c="2"/>}</text:p>
      <text:p text:style-name="P133"/>
      <text:p text:style-name="P134">e) #include &lt;stdio.h&gt;</text:p>
      <text:p text:style-name="P135"><text:s text:c="3"/>void main(void)</text:p>
      <text:p text:style-name="P136"><text:span text:style-name="T137"><text:s text:c="3"/></text:span><text:span text:style-name="T138">{</text:span></text:p>
      <text:p text:style-name="P139"><text:s text:c="6"/>unsigned int mascara = 0x8000;</text:p>
      <text:p text:style-name="P140"><text:s text:c="6"/>int valor;</text:p>
      <text:p text:style-name="P141"/>
      <text:p text:style-name="P142"><text:s text:c="6"/>printf("\nDigite um valor:");</text:p>
      <text:p text:style-name="P143"><text:s text:c="6"/>scanf("%d", &amp;valor);</text:p>
      <text:p text:style-name="P144"><text:s text:c="6"/>while(mascara) {</text:p>
      <text:p text:style-name="P145"><text:s text:c="9"/>printf("%d", (valor &amp; mascara) ? 1 : 0);</text:p>
      <text:p text:style-name="P146"><text:s text:c="9"/>mascara &gt;&gt;= 1;</text:p>
      <text:p text:style-name="P147"><text:span text:style-name="T148"><text:s text:c="6"/>}</text:span><text:span text:style-name="T149">IMPRIME O VAL</text:span><text:span text:style-name="T150">OR EM BINARIO</text:span></text:p>
      <text:p text:style-name="P151"><text:s text:c="3"/>}</text:p>
      <text:p text:style-name="P152"/>
      <text:p text:style-name="P153"/>
      <text:p text:style-name="P154">III – Escrever programas:</text:p>
      <text:p text:style-name="P155"/>
      <text:p text:style-name="P156">1) Lê caracteres do teclado enquanto não se digitar ESC(ASCII 27). Para cada caracter lido, classificá-lo como:</text:p>
      <text:p text:style-name="P157"/>
      <text:p text:style-name="P158">- Caracter de controle:<text:s/><text:tab/>0 a 31 e 127</text:p>
      <text:p text:style-name="P159">- Caracter alfabético maiúsculo:<text:s/><text:tab/>65 a 90</text:p>
      <text:p text:style-name="P160">- Caracter<text:s/>alfabético minúsculo:<text:tab/>97 a 122</text:p>
      <text:p text:style-name="P161">- Caracter numérico:<text:s/><text:tab/>48 a 57</text:p>
      <text:p text:style-name="P162">- Caracter de pontuação: imprimível, não alfabético e não numérico.</text:p>
      <text:p text:style-name="P163"/>
      <text:p text:style-name="Recuodecorpodetexto2">Obs.: Caracter imprimível: 32 a 126. Caracter alfabético: maiúsculos + minúsculos</text:p>
      <text:p text:style-name="P164"/>
      <text:p text:style-name="P165"/>
      <text:p text:style-name="P166">#include &lt;stdio.h&gt;</text:p>
      <text:p text:style-name="P167">#include &lt;conio.h&gt;</text:p>
      <text:p text:style-name="P168">#define ESC 27</text:p>
      <text:p text:style-name="P169"/>
      <text:p text:style-name="P170"/>
      <text:p text:style-name="P171"/>
      <text:p text:style-name="P172">int main(){</text:p>
      <text:p text:style-name="P173"><text:tab/>int control=0,alfaMai=0,alfaMin=0,num=0,imprimivel=0;</text:p>
      <text:p text:style-name="P174"><text:tab/>unsigned char tecla;</text:p>
      <text:p text:style-name="P175"><text:tab/>tecla=getch();</text:p>
      <text:p text:style-name="P176"><text:tab/>while(tecla!= ESC){</text:p>
      <text:p text:style-name="P177"><text:tab/><text:tab/>//Caracter de controle:<text:s/><text:tab/>0 a 31 e 127</text:p>
      <text:p text:style-name="P178"><text:tab/><text:tab/>if(tecla&gt;=1 &amp;&amp; tecla&lt;=31 ||tecla ==127)</text:p>
      <text:p text:style-name="P179"><text:tab/><text:tab/>{</text:p>
      <text:p text:style-name="P180"><text:tab/><text:tab/><text:tab/>control++;</text:p>
      <text:p text:style-name="P181"><text:tab/><text:tab/>}</text:p>
      <text:p text:style-name="P182"><text:tab/><text:tab/>//Caracter alfabético maiúsculo:<text:s/><text:tab/>65 a 90</text:p>
      <text:p text:style-name="P183"><text:tab/><text:tab/>if(tecla&gt;=65 &amp;&amp; tecla&lt;=90){</text:p>
      <text:p text:style-name="P184"><text:tab/><text:tab/><text:tab/>alfaMai++;</text:p>
      <text:p text:style-name="P185"><text:tab/><text:tab/>}</text:p>
      <text:p text:style-name="P186"><text:tab/><text:tab/>//Caracter alfabético minúsculo:<text:tab/>97 a 122</text:p>
      <text:p text:style-name="P187"><text:tab/><text:tab/>if(tecla&gt;=97 &amp;&amp; tecla&lt;=122)</text:p>
      <text:p text:style-name="P188"><text:tab/><text:tab/>{</text:p>
      <text:p text:style-name="P189"><text:tab/><text:tab/><text:tab/>alfaMin++;</text:p>
      <text:p text:style-name="P190"><text:tab/></text:p>
      <text:p text:style-name="P191"><text:tab/><text:tab/>}</text:p>
      <text:p text:style-name="P192"><text:tab/><text:tab/>//Caracter numérico:<text:s/><text:tab/>48 a 57</text:p>
      <text:p text:style-name="P193"><text:tab/><text:tab/>if(tecla&gt;=48 &amp;&amp; tecla&lt;=57){</text:p>
      <text:p text:style-name="P194"><text:tab/><text:tab/><text:tab/>num++;</text:p>
      <text:p text:style-name="P195"><text:tab/><text:tab/>}</text:p>
      <text:p text:style-name="P196"><text:tab/><text:tab/>//Caracter de pontuação: imprimível, não alfabético e não numérico.</text:p>
      <text:p text:style-name="P197"><text:tab/><text:tab/>if(tecla&gt;=32 &amp;&amp; tecla&lt;=126)</text:p>
      <text:p text:style-name="P198"><text:tab/><text:tab/>{</text:p>
      <text:p text:style-name="P199"><text:tab/><text:tab/><text:tab/>imprimivel++;</text:p>
      <text:p text:style-name="P200"><text:tab/><text:tab/>}</text:p>
      <text:p text:style-name="P201"><text:tab/><text:tab/>printf("\n %c",tecla);</text:p>
      <text:p text:style-name="P202"><text:tab/><text:tab/>tecla=getch();</text:p>
      <text:p text:style-name="P203"><text:tab/>}</text:p>
      <text:p text:style-name="P204"><text:tab/>printf("\n %d controle\n %d alfabético maiúsculo\n %d alfabetico minusculo\n<text:s/>%d numerico\n %d imprimivel",control,alfaMai,alfaMin,num,imprimivel);</text:p>
      <text:p text:style-name="P205">}</text:p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>2) Lê do teclado 5 números inteiros, e fornece:</text:p>
      <text:p text:style-name="P222"/>
      <text:p text:style-name="P223">- A média aritmética</text:p>
      <text:p text:style-name="P224">- O produto dos 3 primeiros.</text:p>
      <text:p text:style-name="P225">- Quantidade de dígitos (casas) do primeiro valor, através de<text:s/>sucessivas divisões por 10.</text:p>
      <text:p text:style-name="P226"/>
      <text:p text:style-name="P227">int media(int a,int b,int c,int d,int e);</text:p>
      <text:p text:style-name="P228">int prod(int a,int b,int c);</text:p>
      <text:p text:style-name="P229">int qtd_casas(int a);</text:p>
      <text:p text:style-name="P230">#include &lt;stdio.h&gt;</text:p>
      <text:p text:style-name="P231">#include &lt;conio.h&gt;</text:p>
      <text:p text:style-name="P232"/>
      <text:p text:style-name="P233">int main(){</text:p>
      <text:p text:style-name="P234"><text:tab/>int a,b,c,d,e;</text:p>
      <text:p text:style-name="P235"><text:tab/>scanf("%d %d %d %d %d",&amp;a,&amp;b,&amp;c,&amp;d,&amp;e);</text:p>
      <text:p text:style-name="P236"><text:tab/>printf("A media e: %d<text:s/>\n",media(a,b,c,d,e));</text:p>
      <text:p text:style-name="P237"><text:tab/>printf("O prod dos tres primeiros e: %d \n",prod(a,b,c));</text:p>
      <text:p text:style-name="P238"><text:tab/>printf("O prod dos tres primeiros e: %d \n",prod(a,b,c));</text:p>
      <text:p text:style-name="P239"><text:tab/>printf("O primeiro valor tem %d casas",qtd_casas(a));</text:p>
      <text:p text:style-name="P240">}</text:p>
      <text:p text:style-name="P241">int media(int a,int b,int c,int d,int e)</text:p>
      <text:p text:style-name="P242">{</text:p>
      <text:p text:style-name="P243"><text:tab/>int m;</text:p>
      <text:p text:style-name="P244"><text:tab/>m=(a+b+c+d+e)/5;</text:p>
      <text:p text:style-name="P245"><text:tab/>return m;</text:p>
      <text:p text:style-name="P246">}</text:p>
      <text:p text:style-name="P247">int prod(int a,int b,int c)</text:p>
      <text:p text:style-name="P248">{</text:p>
      <text:p text:style-name="P249"><text:tab/>int prod;</text:p>
      <text:p text:style-name="P250"><text:tab/>prod=a*b*c;</text:p>
      <text:p text:style-name="P251"><text:tab/>return prod;</text:p>
      <text:p text:style-name="P252">}</text:p>
      <text:p text:style-name="P253">int qtd_casas(int a)</text:p>
      <text:p text:style-name="P254">{</text:p>
      <text:p text:style-name="P255"><text:tab/>int cont=0;</text:p>
      <text:p text:style-name="P256"><text:tab/>while(a&gt;0)</text:p>
      <text:p text:style-name="P257"><text:tab/>{</text:p>
      <text:p text:style-name="P258"><text:tab/><text:tab/>a=a/10;</text:p>
      <text:p text:style-name="P259"><text:tab/><text:tab/>cont++;</text:p>
      <text:p text:style-name="P260"><text:tab/>}</text:p>
      <text:p text:style-name="P261"><text:tab/>return cont;</text:p>
      <text:p text:style-name="P262">}</text:p>
      <text:p text:style-name="P263"/>
      <text:p text:style-name="P264">3)  Lê 3 números double em 3 variáveis: a, b e c. Em seguida, faz troca<text:s/>de valores<text:s/>entre as variáveis de modo que: a &lt;= b &amp;&amp; b &lt;= c.</text:p>
      <text:p text:style-name="P265">Falta arrumar</text:p>
      <text:p text:style-name="P266">#include &lt;stdio.h&gt;</text:p>
      <text:p text:style-name="P267">#define MAX(x,y) (x&gt;y)?x:y</text:p>
      <text:p text:style-name="P268">#define MIN(x,y) (x&lt;y)?x:y</text:p>
      <text:p text:style-name="P269">int main()</text:p>
      <text:p text:style-name="P270">{</text:p>
      <text:p text:style-name="P271"><text:tab/>double a,b,c,aux,aux1;</text:p>
      <text:p text:style-name="P272"><text:tab/>scanf("%d %d %d",&amp;a, &amp;b, &amp;c);</text:p>
      <text:p text:style-name="P273"><text:tab/>printf("%d %d %d\n",a,b,c);</text:p>
      <text:p text:style-name="P274"><text:tab/>aux=c;//10</text:p>
      <text:p text:style-name="P275"><text:tab/>c=MAX((MAX(a,b)),c);//(10,20),30)=30</text:p>
      <text:p text:style-name="P276"><text:tab/>aux1=a;//30</text:p>
      <text:p text:style-name="P277"><text:tab/>a=MIN(MIN(a,b),aux);</text:p>
      <text:p text:style-name="P278"><text:tab/>//b=MAX((MIN(aux,b)),aux1);</text:p>
      <text:p text:style-name="P279"><text:tab/>b=MAX((MIN(aux,c)),b);</text:p>
      <text:p text:style-name="P280"><text:tab/>printf("%d %d %d\n",a,b,c);</text:p>
      <text:p text:style-name="P281"><text:tab/>return 0;</text:p>
      <text:p text:style-name="P282">}</text:p>
      <text:p text:style-name="P283">IV – Escrever macros:</text:p>
      <text:p text:style-name="P284"/>
      <text:p text:style-name="P285"><text:span text:style-name="T286">1) </text:span><text:span text:style-name="T287">bissexto(ano);</text:span></text:p>
      <text:p text:style-name="P288"/>
      <text:p text:style-name="P289"><text:span text:style-name="T290">Esta macro deverá retornar 1 se<text:s/></text:span><text:span text:style-name="T291">ano</text:span><text:span text:style-name="T292"><text:s/>for um ano bissexto, i.e, divisível por 4 e não por 100, ou divisível por 400; e 0 se não for.</text:span></text:p>
      <text:p text:style-name="P293">#define bissexto(n)<text:s/>(n%4==0 &amp;&amp;n%100!=0 ||n%400==0)?1:0<text:s/></text:p>
      <text:p text:style-name="Corpodetexto2">2) <text:span text:style-name="T294">para_maiusculo(ch)</text:span></text:p>
      <text:p text:style-name="Corpodetexto2">#define MAI(char) (char&gt;96 &amp;&amp; char&lt;123)?char-32:char</text:p>
      <text:p text:style-name="Corpodetexto2">Se ch é letra minúscula, retornar a letra maiúscula correspondente, senão, retornar o próprio ch.</text:p>
      <text:p text:style-name="P295"/>
      <text:p text:style-name="P296">V - Explique com suas próprias palavras:</text:p>
      <text:p text:style-name="P297"/>
      <text:p text:style-name="P298">1) O que é e qual a principal importância de um<text:s/>protótipo de função?</text:p>
      <text:p text:style-name="P299">O compilador não vai reconhecer a existência daquela função</text:p>
      <text:p text:style-name="P300">2) Qual a principal diferença entre um função e uma macro parametrizada?</text:p>
      <text:p text:style-name="P301">Função são algo mais complexos e macro parametrizada servem para coisas simples</text:p>
      <text:p text:style-name="P302">3) O que caracteriza um deslocamento de bits à direita do tipo aritmético?</text:p>
      <text:p text:style-name="P303">&gt;&gt;</text:p>
      <text:p text:style-name="Recuodecorpodetexto3">4) Por que quando se escreve uma macro parametrizada, o parâmetro e a expressão completa devem ser escritos entre parênteses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4pt" style:font-size-asian="14pt" style:font-size-complex="14pt" fo:hyphenate="false"/>
    </style:style>
    <style:style style:name="Normal" style:display-name="Normal" style:family="paragraph">
      <style:paragraph-properties style:text-autospace="none" fo:margin-bottom="0in" fo:line-height="100%"/>
      <style:text-properties style:font-name="Times New Roman" fo:font-size="12pt" style:font-size-asian="12pt" style:font-size-complex="12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Corpodetexto2" style:display-name="Corpo de texto 2" style:family="paragraph" style:parent-style-name="Normal">
      <style:paragraph-properties fo:text-align="justify"/>
      <style:text-properties fo:font-size="10pt" style:font-size-asian="10pt" style:font-size-complex="10pt" fo:hyphenate="false"/>
    </style:style>
    <style:style style:name="Corpodetexto2Char" style:display-name="Corpo de texto 2 Char" style:family="text" style:parent-style-name="Fonteparág.padrão">
      <style:text-properties style:font-name="Times New Roman" style:font-name-complex="Times New Roman" fo:font-size="12pt" style:font-size-asian="12pt" style:font-size-complex="12pt"/>
    </style:style>
    <style:style style:name="Lista" style:display-name="Lista" style:family="paragraph" style:parent-style-name="Normal">
      <style:paragraph-properties fo:margin-left="0.1965in" fo:text-indent="-0.1965in">
        <style:tab-stops/>
      </style:paragraph-properties>
      <style:text-properties fo:hyphenate="false"/>
    </style:style>
    <style:style style:name="Lista2" style:display-name="Lista 2" style:family="paragraph" style:parent-style-name="Normal">
      <style:paragraph-properties fo:margin-left="0.393in" fo:text-indent="-0.1965in">
        <style:tab-stops/>
      </style:paragraph-properties>
      <style:text-properties fo:hyphenate="false"/>
    </style:style>
    <style:style style:name="Commarcadores2" style:display-name="Com marcadores 2" style:family="paragraph" style:parent-style-name="Normal" style:auto-update="true" style:list-style-name="LFO2">
      <style:text-properties fo:hyphenate="false"/>
    </style:style>
    <style:style style:name="Listadecontinuação" style:display-name="Lista de continuação" style:family="paragraph" style:parent-style-name="Normal">
      <style:paragraph-properties fo:margin-bottom="0.0833in" fo:margin-left="0.1965in">
        <style:tab-stops/>
      </style:paragraph-properties>
      <style:text-properties fo:hyphenate="false"/>
    </style:style>
    <style:style style:name="Título" style:display-name="Título" style:family="paragraph" style:parent-style-name="Normal" style:default-outline-level="1">
      <style:paragraph-properties fo:text-align="center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TítuloChar" style:display-name="Título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Corpodetexto" style:display-name="Corpo de texto" style:family="paragraph" style:parent-style-name="Normal">
      <style:paragraph-properties fo:margin-bottom="0.0833in"/>
      <style:text-properties fo:hyphenate="false"/>
    </style:style>
    <style:style style:name="CorpodetextoChar" style:display-name="Corpo de texto Char" style:family="text" style:parent-style-name="Fonteparág.padrão">
      <style:text-properties style:font-name="Times New Roman" style:font-name-complex="Times New Roman" fo:font-size="12pt" style:font-size-asian="12pt" style:font-size-complex="12pt"/>
    </style:style>
    <style:style style:name="Subtítulo" style:display-name="Subtítulo" style:family="paragraph" style:parent-style-name="Normal" style:default-outline-level="2">
      <style:paragraph-properties fo:text-align="center" fo:margin-bottom="0.0416in"/>
      <style:text-properties style:font-name="Arial" style:font-name-complex="Arial" fo:hyphenate="false"/>
    </style:style>
    <style:style style:name="SubtítuloChar" style:display-name="Subtítulo Char" style:family="text" style:parent-style-name="Fonteparág.padrão">
      <style:text-properties style:font-name="Cambria" style:font-name-asian="Times New Roman" style:font-name-complex="Times New Roman" fo:font-size="12pt" style:font-size-asian="12pt" style:font-size-complex="12pt"/>
    </style:style>
    <style:style style:name="Recuodecorpodetexto2" style:display-name="Recuo de corpo de texto 2" style:family="paragraph" style:parent-style-name="Normal">
      <style:paragraph-properties fo:text-align="justify" fo:margin-left="0.5312in" fo:text-indent="-0.3937in">
        <style:tab-stops/>
      </style:paragraph-properties>
      <style:text-properties fo:font-size="10pt" style:font-size-asian="10pt" style:font-size-complex="10pt" fo:hyphenate="false"/>
    </style:style>
    <style:style style:name="Recuodecorpodetexto2Char" style:display-name="Recuo de corpo de texto 2 Char" style:family="text" style:parent-style-name="Fonteparág.padrão">
      <style:text-properties style:font-name="Times New Roman" style:font-name-complex="Times New Roman" fo:font-size="12pt" style:font-size-asian="12pt" style:font-size-complex="12pt"/>
    </style:style>
    <style:style style:name="Recuodecorpodetexto3" style:display-name="Recuo de corpo de texto 3" style:family="paragraph" style:parent-style-name="Normal">
      <style:paragraph-properties fo:text-align="justify" fo:margin-left="0.1576in" fo:text-indent="-0.1576in">
        <style:tab-stops/>
      </style:paragraph-properties>
      <style:text-properties fo:font-size="10pt" style:font-size-asian="10pt" style:font-size-complex="10pt" fo:hyphenate="false"/>
    </style:style>
    <style:style style:name="Recuodecorpodetexto3Char" style:display-name="Recuo de corpo de texto 3 Char" style:family="text" style:parent-style-name="Fonteparág.padrão">
      <style:text-properties style:font-name="Times New Roman" style:font-name-complex="Times New Roman" fo:font-size="8pt" style:font-size-asian="8pt" style:font-size-complex="8pt"/>
    </style:style>
    <style:style style:name="WW_CharLFO1LVL1" style:family="text">
      <style:text-properties style:font-name="Symbol"/>
    </style:style>
    <text:list-style style:name="LFO2" style:display-name="LFO2">
      <text:list-level-style-bullet text:level="1" text:style-name="WW_CharLFO1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44in" fo:page-height="8.2687in" style:print-orientation="landscape" fo:margin-top="1.1812in" fo:margin-left="0.9847in" fo:margin-bottom="1.1812in" fo:margin-right="0.9847in" style:num-format="1" style:writing-mode="lr-tb">
        <style:columns fo:column-count="2" fo:column-gap="0.3152in">
          <style:column-sep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FACULDADE DE TECNOLOGIA DE SÃO PAULO</dc:title>
    <dc:description/>
    <dc:subject/>
    <meta:initial-creator>Word Development</meta:initial-creator>
    <dc:creator>aluno</dc:creator>
    <meta:creation-date>2019-03-21T09:41:00Z</meta:creation-date>
    <dc:date>2019-03-21T15:05:00Z</dc:date>
    <meta:template xlink:href="Normal" xlink:type="simple"/>
    <meta:editing-cycles>5</meta:editing-cycles>
    <meta:editing-duration>PT7740S</meta:editing-duration>
    <meta:document-statistic meta:page-count="1" meta:paragraph-count="11" meta:word-count="873" meta:character-count="5582" meta:row-count="39" meta:non-whitespace-character-count="4720"/>
  </office:meta>
</office:document-meta>
</file>